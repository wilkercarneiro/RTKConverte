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8" style:family="table-column">
      <style:table-column-properties fo:break-before="auto" style:column-width="3.981cm"/>
    </style:style>
    <style:style style:name="co29" style:family="table-column">
      <style:table-column-properties fo:break-before="auto" style:column-width="6.325cm"/>
    </style:style>
    <style:style style:name="co30" style:family="table-column">
      <style:table-column-properties fo:break-before="auto" style:column-width="4.283cm"/>
    </style:style>
    <style:style style:name="co31" style:family="table-column">
      <style:table-column-properties fo:break-before="auto" style:column-width="3.671cm"/>
    </style:style>
    <style:style style:name="co32" style:family="table-column">
      <style:table-column-properties fo:break-before="auto" style:column-width="6.237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1.265cm"/>
    </style:style>
    <style:style style:name="co35" style:family="table-column">
      <style:table-column-properties fo:break-before="auto" style:column-width="7.525cm"/>
    </style:style>
    <style:style style:name="co36" style:family="table-column">
      <style:table-column-properties fo:break-before="auto" style:column-width="7.146cm"/>
    </style:style>
    <style:style style:name="co37" style:family="table-column">
      <style:table-column-properties fo:break-before="auto" style:column-width="4.424cm"/>
    </style:style>
    <style:style style:name="co38" style:family="table-column">
      <style:table-column-properties fo:break-before="auto" style:column-width="3.203cm"/>
    </style:style>
    <style:style style:name="co39" style:family="table-column">
      <style:table-column-properties fo:break-before="auto" style:column-width="4.747cm"/>
    </style:style>
    <style:style style:name="co40" style:family="table-column">
      <style:table-column-properties fo:break-before="auto" style:column-width="2.981cm"/>
    </style:style>
    <style:style style:name="co1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99cm"/>
    </style:style>
    <style:style style:name="co16" style:family="table-column">
      <style:table-column-properties fo:break-before="auto" style:column-width="7.338cm"/>
    </style:style>
    <style:style style:name="co17" style:family="table-column">
      <style:table-column-properties fo:break-before="auto" style:column-width="2.071cm"/>
    </style:style>
    <style:style style:name="co18" style:family="table-column">
      <style:table-column-properties fo:break-before="auto" style:column-width="3.078cm"/>
    </style:style>
    <style:style style:name="co19" style:family="table-column">
      <style:table-column-properties fo:break-before="auto" style:column-width="2.279cm"/>
    </style:style>
    <style:style style:name="co20" style:family="table-column">
      <style:table-column-properties fo:break-before="auto" style:column-width="1.759cm"/>
    </style:style>
    <style:style style:name="co21" style:family="table-column">
      <style:table-column-properties fo:break-before="auto" style:column-width="1.446cm"/>
    </style:style>
    <style:style style:name="co22" style:family="table-column">
      <style:table-column-properties fo:break-before="auto" style:column-width="1.707cm"/>
    </style:style>
    <style:style style:name="co23" style:family="table-column">
      <style:table-column-properties fo:break-before="auto" style:column-width="3.928cm"/>
    </style:style>
    <style:style style:name="co24" style:family="table-column">
      <style:table-column-properties fo:break-before="auto" style:column-width="6.165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781cm"/>
    </style:style>
    <style:style style:name="co27" style:family="table-column">
      <style:table-column-properties fo:break-before="auto" style:column-width="3.653cm"/>
    </style:style>
    <style:style style:name="co41" style:family="table-column">
      <style:table-column-properties fo:break-before="auto" style:column-width="2.614cm"/>
    </style:style>
    <style:style style:name="co42" style:family="table-column">
      <style:table-column-properties fo:break-before="auto" style:column-width="3.48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034cm"/>
    </style:style>
    <style:style style:name="co45" style:family="table-column">
      <style:table-column-properties fo:break-before="auto" style:column-width="2.037cm"/>
    </style:style>
    <style:style style:name="co46" style:family="table-column">
      <style:table-column-properties fo:break-before="auto" style:column-width="1.665cm"/>
    </style:style>
    <style:style style:name="co47" style:family="table-column">
      <style:table-column-properties fo:break-before="auto" style:column-width="4.082cm"/>
    </style:style>
    <style:style style:name="co48" style:family="table-column">
      <style:table-column-properties fo:break-before="auto" style:column-width="2.004cm"/>
    </style:style>
    <style:style style:name="co49" style:family="table-column">
      <style:table-column-properties fo:break-before="auto" style:column-width="1.739cm"/>
    </style:style>
    <style:style style:name="co50" style:family="table-column">
      <style:table-column-properties fo:break-before="auto" style:column-width="1.789cm"/>
    </style:style>
    <style:style style:name="co51" style:family="table-column">
      <style:table-column-properties fo:break-before="auto" style:column-width="7.28cm"/>
    </style:style>
    <style:style style:name="co52" style:family="table-column">
      <style:table-column-properties fo:break-before="auto" style:column-width="4.879cm"/>
    </style:style>
    <style:style style:name="co53" style:family="table-column">
      <style:table-column-properties fo:break-before="auto" style:column-width="10.16cm"/>
    </style:style>
    <style:style style:name="co54" style:family="table-column">
      <style:table-column-properties fo:break-before="auto" style:column-width="4.117cm"/>
    </style:style>
    <style:style style:name="co55" style:family="table-column">
      <style:table-column-properties fo:break-before="auto" style:column-width="2.574cm"/>
    </style:style>
    <style:style style:name="co56" style:family="table-column">
      <style:table-column-properties fo:break-before="auto" style:column-width="2.623cm"/>
    </style:style>
    <style:style style:name="co57" style:family="table-column">
      <style:table-column-properties fo:break-before="auto" style:column-width="2.723cm"/>
    </style:style>
    <style:style style:name="co58" style:family="table-column">
      <style:table-column-properties fo:break-before="auto" style:column-width="1.704cm"/>
    </style:style>
    <style:style style:name="ro2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ro7" style:family="table-row">
      <style:table-row-properties style:row-height="0.68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1.736cm" fo:break-before="auto" style:use-optimal-row-height="false"/>
    </style:style>
    <style:style style:name="ro13" style:family="table-row">
      <style:table-row-properties style:row-height="1.012c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43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44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45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46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background-color="#800000"/>
      <style:text-properties fo:color="#ffffff"/>
    </style:style>
    <style:style style:name="ce148" style:family="table-cell" style:parent-style-name="Default">
      <style:text-properties style:font-name="Arial" style:font-name-asian="Arial Unicode MS" style:font-name-complex="Tahoma"/>
    </style:style>
    <style:style style:name="ce149" style:family="table-cell" style:parent-style-name="Default" style:data-style-name="N160"/>
    <style:style style:name="ce150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51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52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53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54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55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56" style:family="table-cell" style:parent-style-name="Default" style:data-style-name="N99"/>
    <style:style style:name="ce15" style:family="table-cell" style:parent-style-name="Default">
      <style:table-cell-properties fo:background-color="#422525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422525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17" style:family="table-cell" style:parent-style-name="Default">
      <style:table-cell-properties fo:border="0.06pt solid #ffffff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353d71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353d71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58" style:family="table-cell" style:parent-style-name="Default">
      <style:table-cell-properties fo:border="0.06pt solid #ffffff"/>
    </style:style>
    <style:style style:name="ce21" style:family="table-cell" style:parent-style-name="Default">
      <style:table-cell-properties fo:background-color="#345b3a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23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style:font-name="Arial" fo:font-size="9pt" style:font-name-asian="Arial Unicode MS" style:font-size-asian="9pt" style:font-name-complex="Tahoma" style:font-size-complex="9pt"/>
    </style:style>
    <style:style style:name="ce24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25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transparent" fo:border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ead6d6" style:cell-protect="none" style:print-content="true" fo:border="0.06pt solid #ffffff"/>
    </style:style>
    <style:style style:name="ce29" style:family="table-cell" style:parent-style-name="Default">
      <style:table-cell-properties fo:background-color="#9aa3e2" style:cell-protect="none" style:print-content="true" fo:border="0.06pt solid #ffffff"/>
    </style:style>
    <style:style style:name="ce30" style:family="table-cell" style:parent-style-name="Default">
      <style:table-cell-properties fo:background-color="#9aa3e2" style:cell-protect="none" style:print-content="true" fo:border="0.06pt solid #ffffff"/>
      <style:text-properties style:font-name="Arial" fo:font-size="8pt" style:font-name-asian="Arial Unicode MS" style:font-size-asian="8pt" style:font-name-complex="Arial Unicode MS" style:font-size-complex="8pt"/>
    </style:style>
    <style:style style:name="ce31" style:family="table-cell" style:parent-style-name="Default" style:data-style-name="N100">
      <style:table-cell-properties fo:background-color="#9aa3e2" style:cell-protect="none" style:print-content="true" fo:border="0.06pt solid #ffffff"/>
      <style:text-properties style:font-name="Arial" style:font-name-asian="Arial Unicode MS" style:font-name-complex="Tahoma"/>
    </style:style>
    <style:style style:name="ce32" style:family="table-cell" style:parent-style-name="Default">
      <style:table-cell-properties fo:background-color="#ffffff" fo:border="0.06pt solid #ffffff"/>
    </style:style>
    <style:style style:name="ce33" style:family="table-cell" style:parent-style-name="Default">
      <style:table-cell-properties fo:background-color="#b1c5b5" style:cell-protect="none" style:print-content="true" fo:border="0.06pt solid #ffffff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b1c5b5" style:cell-protect="none" style:print-content="true" fo:border="0.06pt solid #ffffff"/>
      <style:text-properties style:font-name="Arial" fo:font-size="8pt" style:font-name-asian="Arial" style:font-size-asian="8pt" style:font-name-complex="Arial" style:font-size-complex="8pt"/>
    </style:style>
    <style:style style:name="ce35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ce36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style:font-name="Arial" fo:font-weight="bold" style:font-name-asian="Arial Unicode MS" style:font-weight-asian="bold" style:font-name-complex="Tahoma" style:font-weight-complex="bold"/>
    </style:style>
    <style:style style:name="ce77" style:family="table-cell" style:parent-style-name="Default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422525" fo:border="0.06pt solid #ffffff"/>
      <style:text-properties fo:color="#ffffff"/>
    </style:style>
    <style:style style:name="ce106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  <style:text-properties fo:font-size="8pt" fo:font-weight="350"/>
    </style:style>
    <style:style style:name="ce40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104" style:family="table-cell" style:parent-style-name="Default">
      <style:table-cell-properties style:cell-protect="none" style:print-content="true"/>
    </style:style>
    <style:style style:name="ce41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start" fo:margin-left="0cm"/>
    </style:style>
    <style:style style:name="ce42" style:family="table-cell" style:parent-style-name="Default">
      <style:table-cell-properties style:cell-protect="none" style:print-content="true" fo:background-color="transparent"/>
    </style:style>
    <style:style style:name="ce43" style:family="table-cell" style:parent-style-name="Default" style:data-style-name="N100">
      <style:table-cell-properties fo:background-color="#355e00" fo:border="0.06pt solid #ffffff"/>
      <style:text-properties fo:color="#ffffff"/>
    </style:style>
    <style:style style:name="ce44" style:family="table-cell" style:parent-style-name="Default" style:data-style-name="N100">
      <style:table-cell-properties fo:border="0.06pt solid #ffffff"/>
    </style:style>
    <style:style style:name="ce45" style:family="table-cell" style:parent-style-name="Default" style:data-style-name="N100">
      <style:table-cell-properties fo:background-color="#b1c5b5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">
      <style:table-cell-properties fo:background-color="#90a694" style:cell-protect="none" style:print-content="true" style:text-align-source="fix" style:repeat-content="false" fo:border="0.06pt solid #ffffff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117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350"/>
    </style:style>
    <style:style style:name="ce49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cell-protect="none" style:print-content="true" fo:background-color="transparent"/>
    </style:style>
    <style:style style:name="ce51" style:family="table-cell" style:parent-style-name="Default" style:data-style-name="N100">
      <style:table-cell-properties fo:background-color="#355e00" fo:border="0.06pt solid #ffffff"/>
      <style:text-properties fo:color="#000000"/>
    </style:style>
    <style:style style:name="ce52" style:family="table-cell" style:parent-style-name="Default" style:data-style-name="N100">
      <style:table-cell-properties fo:border="0.06pt solid #ffffff"/>
      <style:text-properties style:use-window-font-color="true"/>
    </style:style>
    <style:style style:name="ce53" style:family="table-cell" style:parent-style-name="Default" style:data-style-name="N100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999999" fo:font-size="9pt" fo:font-weight="bold" style:font-size-asian="9pt" style:font-weight-asian="bold" style:font-size-complex="9pt" style:font-weight-complex="bold"/>
    </style:style>
    <style:style style:name="ce88" style:family="table-cell" style:parent-style-name="Default">
      <style:table-cell-properties style:cell-protect="none" style:print-content="true" style:text-align-source="fix" style:repeat-content="false" fo:padding="0.071cm"/>
      <style:paragraph-properties fo:text-align="center" fo:margin-left="0cm"/>
    </style:style>
    <style:style style:name="ce123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  <style:text-properties fo:font-size="12pt" fo:font-weight="normal"/>
    </style:style>
    <style:style style:name="ce55" style:family="table-cell" style:parent-style-name="Default">
      <style:table-cell-properties fo:background-color="#355e00" fo:border="0.06pt solid #ffffff"/>
      <style:text-properties fo:color="#ffffff"/>
    </style:style>
    <style:style style:name="ce70" style:family="table-cell" style:parent-style-name="Default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127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350"/>
    </style:style>
    <style:style style:name="ce125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116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118" style:family="table-cell" style:parent-style-name="Default">
      <style:table-cell-properties fo:background-color="#355e00" style:text-align-source="fix" style:repeat-content="false" fo:border="0.06pt solid #ffffff"/>
      <style:paragraph-properties fo:text-align="center" fo:margin-left="0cm"/>
      <style:text-properties fo:color="#ffffff"/>
    </style:style>
    <style:style style:name="ce119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120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  <style:text-properties fo:color="#ffffff"/>
    </style:style>
    <style:style style:name="ce121" style:family="table-cell" style:parent-style-name="Default">
      <style:table-cell-properties fo:background-color="#9aa3e2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350"/>
    </style:style>
    <style:style style:name="ce122" style:family="table-cell" style:parent-style-name="Default">
      <style:table-cell-properties fo:background-color="#9aa3e2" style:cell-protect="none" style:print-content="true" style:text-align-source="fix" style:repeat-content="false" fo:border="0.06pt solid #ffffff"/>
      <style:paragraph-properties fo:text-align="center" fo:margin-left="0cm"/>
    </style:style>
    <style:style style:name="ce124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</style:style>
    <style:style style:name="ce78" style:family="table-cell" style:parent-style-name="Default">
      <style:table-cell-properties fo:background-color="#4e5791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79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</style:style>
    <style:style style:name="ce80" style:family="table-cell" style:parent-style-name="Default">
      <style:table-cell-properties fo:background-color="#4e5791" fo:border="0.06pt solid #ffffff"/>
    </style:style>
    <style:style style:name="ce139" style:family="table-cell" style:parent-style-name="Default">
      <style:table-cell-properties fo:background-color="#9aa3e2" style:cell-protect="none" style:print-content="true" fo:border="0.06pt solid #ffffff"/>
      <style:text-properties fo:font-size="8pt" fo:font-weight="350"/>
    </style:style>
    <style:style style:name="ce81" style:family="table-cell" style:parent-style-name="Default">
      <style:table-cell-properties style:cell-protect="none" style:print-content="true" fo:background-color="transparent" fo:border="none"/>
    </style:style>
    <style:style style:name="ce82" style:family="table-cell" style:parent-style-name="Default">
      <style:table-cell-properties fo:background-color="#345b3a" style:text-align-source="fix" style:repeat-content="false" fo:wrap-option="wrap" style:vertical-align="top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ackground-color="#b1c5b5" style:text-align-source="fix" style:repeat-content="false" fo:wrap-option="wrap" style:vertical-align="top"/>
      <style:paragraph-properties fo:text-align="start" fo:margin-left="0cm"/>
      <style:text-properties fo:color="#182c1b" fo:font-size="8pt" style:font-size-asian="8pt" style:font-size-complex="8pt"/>
    </style:style>
    <style:style style:name="ce134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35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36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37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>
      <style:table-cell-properties fo:background-color="#800000"/>
      <style:text-properties fo:color="#ffffff"/>
    </style:style>
    <style:style style:name="ce140" style:family="table-cell" style:parent-style-name="Default">
      <style:text-properties style:font-name="Arial" style:font-name-asian="Arial Unicode MS" style:font-name-complex="Tahoma"/>
    </style:style>
    <style:style style:name="ce141" style:family="table-cell" style:parent-style-name="Default" style:data-style-name="N160"/>
    <style:style style:name="ce142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57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58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59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60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61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62" style:family="table-cell" style:parent-style-name="Default" style:data-style-name="N99"/>
    <style:style style:name="ce98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64" style:family="table-cell" style:parent-style-name="Default">
      <style:table-cell-properties fo:background-color="#800000" fo:border="0.06pt solid #ffffff"/>
      <style:text-properties fo:color="#ffffff"/>
    </style:style>
    <style:style style:name="ce100" style:family="table-cell" style:parent-style-name="Default">
      <style:table-cell-properties fo:background-color="#800000" fo:border="0.06pt solid #ffffff"/>
      <style:text-properties fo:color="#ffffff" style:font-name="Arial" style:font-name-asian="Arial Unicode MS" style:font-name-complex="Tahoma"/>
    </style:style>
    <style:style style:name="ce101" style:family="table-cell" style:parent-style-name="Default" style:data-style-name="N100"/>
    <style:style style:name="ce1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3" style:family="table-cell" style:parent-style-name="Default" style:data-style-name="N2"/>
    <style:style style:name="gr1" style:family="graphic">
      <style:graphic-properties fo:background-color="#d4adad"/>
    </style:style>
    <style:style style:name="gr2" style:family="graphic">
      <style:graphic-properties fo:background-color="#9aa3e2"/>
      <style:text-properties fo:color="#ffffff"/>
    </style:style>
    <style:style style:name="gr3" style:family="graphic">
      <style:graphic-properties fo:background-color="#9aa3e2"/>
    </style:style>
    <style:style style:name="gr4" style:family="graphic">
      <style:graphic-properties fo:background-color="#b1c5b5"/>
    </style:style>
    <style:style style:name="gr5" style:family="graphic">
      <style:graphic-properties fo:background-color="#345b3a"/>
      <style:paragraph-properties fo:text-align="end"/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&quot;)" table:allow-empty-cell="false" table:display-list="no" table:base-cell-address="identificacao.A20"/>
        <table:content-validation table:name="val2" table:base-cell-address="perimetro_1.A11">
          <table:help-message table:title="Selecione um dos valores da lista" table:display="false">
            <text:p><text:s/></text:p>
          </table:help-message>
        </table:content-validation>
        <table:content-validation table:name="val3" table:condition="of:cell-content-is-in-list(&quot;PG1&quot;;&quot;PG2&quot;;&quot;PG3&quot;;&quot;PG4&quot;;&quot;PG5&quot;;&quot;PG6&quot;;&quot;PG7&quot;;&quot;PG8&quot;;&quot;PG9&quot;;&quot;PT1&quot;;&quot;PT2&quot;;&quot;PT3&quot;;&quot;PT4&quot;;&quot;PT5&quot;;&quot;PT6&quot;;&quot;PT7&quot;;&quot;PT8&quot;;&quot;PA1&quot;;&quot;PA2&quot;;&quot;PS1&quot;;&quot;PS2&quot;;&quot;PS3&quot;;&quot;PS4&quot;;&quot;&quot;)" table:allow-empty-cell="true" table:display-list="unsorted" table:base-cell-address="perimetro_1.H12">
          <table:error-message table:message-type="stop" table:display="true"/>
        </table:content-validation>
        <table:content-validation table:name="val4" table:base-cell-address="perimetro_1.I7">
          <table:error-message table:message-type="stop" table:display="true"/>
        </table:content-validation>
        <table:content-validation table:name="val5" table:condition="of:cell-content-is-in-list(&quot;LA1&quot;;&quot;LA2&quot;;&quot;LA3&quot;;&quot;LA4&quot;;&quot;LA5&quot;;&quot;LA6&quot;;&quot;LA7&quot;;&quot;LN1&quot;;&quot;LN2&quot;;&quot;LN3&quot;;&quot;LN4&quot;;&quot;LN5&quot;;&quot;LN6&quot;;&quot;&quot;)" table:allow-empty-cell="true" table:display-list="unsorted" table:base-cell-address="perimetro_1.I12">
          <table:error-message table:message-type="stop" table:display="true"/>
        </table:content-validation>
      </table:content-validations>
      <table:table table:name="identificacao" table:style-name="ta3"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NaturezaServico" form:control-implementation="ooo:com.sun.star.form.component.ListBox" xml:id="control1" form:id="control1" form:dropdown="true" form:tab-stop="true" form:size="20" form:input-required="false" form:bound-column="1" form:linked-cell="identificacao.B2" form:list-linkage-type="selection" form:source-cell-range="parametros_controles.B2:parametros_controle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Situacao" form:control-implementation="ooo:com.sun.star.form.component.ListBox" xml:id="control2" form:id="control2" form:dropdown="true" form:tab-stop="true" form:size="20" form:input-required="false" form:bound-column="1" form:linked-cell="identificacao.B11" form:list-linkage-type="selection" form:source-cell-range="parametros_controles.B5:parametros_controles.B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NaturezaArea" form:control-implementation="ooo:com.sun.star.form.component.ListBox" xml:id="control3" form:id="control3" form:dropdown="true" form:size="20" form:input-required="false" form:bound-column="1" form:linked-cell="identificacao.B12" form:list-linkage-type="selection" form:source-cell-range="parametros_controles.B9:parametros_controles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TipoPessoa" form:control-implementation="ooo:com.sun.star.form.component.ListBox" xml:id="control4" form:id="control4" form:dropdown="true" form:size="20" form:input-required="false" form:bound-column="1" form:linked-cell="identificacao.B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Identificacao.changedListbox?language=Basic&amp;location=application" xlink:type="simple"/>
              </office:event-listeners>
              <form:option form:label="Física" form:current-selected="true" form:selected="true"/>
              <form:option form:label="Jurídica"/>
            </form:listbox>
            <form:button form:name="btAdicionarMunicipio" form:control-implementation="ooo:com.sun.star.form.component.CommandButton" xml:id="control5" form:id="control5" form:label="Adicionar Municipio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igef.Identificacao.addMunicipio?language=Basic&amp;location=application" xlink:type="simple"/>
              </office:event-listeners>
            </form:button>
            <form:combobox form:name="cmbMunicipio" form:control-implementation="ooo:com.sun.star.form.component.ComboBox" xml:id="control6" form:id="control6" form:dropdown="true" form:size="20" form:input-required="false" form:convert-empty-to-null="true" form:list-source-type="table" form:linked-cell="identificacao.A17" form:source-cell-range="parametros_controles.B23:parametros_controles.B5591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combobox>
            <form:formatted-text form:name="fieldCPF" form:control-implementation="ooo:com.sun.star.form.component.PatternField" xml:id="control7" form:id="control7" form:tab-stop="true" form:current-value="   .   .   -  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LNNNLNNNLNN"/>
                <form:property form:property-name="HelpText" office:value-type="string" office:string-value="Entrada formatada para CPF: '___.___.___-__'"/>
                <form:property form:property-name="LiteralMask" office:value-type="string" office:string-value="   .   .   -  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Identificacao.initCellCpfCnpj?language=Basic&amp;location=application" xlink:type="simple"/>
                <script:event-listener script:language="ooo:script" script:event-name="form:textchange" xlink:href="vnd.sun.star.script:Sigef.Identificacao.setCellCpfCnpj?language=Basic&amp;location=application" xlink:type="simple"/>
              </office:event-listeners>
            </form:formatted-text>
            <form:listbox form:name="lstTipoIdentificacao" form:control-implementation="ooo:com.sun.star.form.component.ListBox" xml:id="control8" form:id="control8" form:dropdown="true" form:size="20" form:input-required="false" form:bound-column="1" form:linked-cell="identificacao.A1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form:option form:label="Matrícula:" form:current-selected="true" form:selected="true"/>
              <form:option form:label="Transcrição:"/>
            </form:listbox>
          </form:form>
        </office:forms>
        <table:table-column table:style-name="co15" table:default-cell-style-name="ce27"/>
        <table:table-column table:style-name="co16" table:default-cell-style-name="ce27"/>
        <table:table-column table:style-name="co17" table:visibility="collapse" table:default-cell-style-name="ce27"/>
        <table:table-column table:style-name="co18" table:visibility="collapse" table:default-cell-style-name="ce27"/>
        <table:table-column table:style-name="co19" table:visibility="collapse" table:default-cell-style-name="ce27"/>
        <table:table-column table:style-name="co20" table:visibility="collapse" table:default-cell-style-name="ce27"/>
        <table:table-column table:style-name="co21" table:visibility="collapse" table:default-cell-style-name="ce27"/>
        <table:table-column table:style-name="co22" table:visibility="collapse" table:default-cell-style-name="ce27"/>
        <table:table-column table:style-name="co23" table:visibility="collapse" table:default-cell-style-name="ce27"/>
        <table:table-column table:style-name="co24" table:visibility="collapse" table:default-cell-style-name="ce27"/>
        <table:table-column table:style-name="co25" table:visibility="collapse" table:number-columns-repeated="1013" table:default-cell-style-name="ce27"/>
        <table:table-column table:style-name="co26" table:visibility="collapse" table:default-cell-style-name="ce27"/>
        <table:table-row table:style-name="ro7">
          <table:table-cell table:style-name="ce15" office:value-type="string" calcext:value-type="string" table:number-columns-spanned="2" table:number-rows-spanned="1">
            <text:p>Identificação do Serviço de Georreferenciamento</text:p>
            <draw:control table:end-cell-address="identificacao.B2" table:end-x="7.336cm" table:end-y="0.425cm" draw:z-index="0" draw:style-name="gr1" draw:text-style-name="P1" svg:width="7.34cm" svg:height="0.513cm" svg:x="5.986cm" svg:y="0.595cm" draw:control="control1"/>
          </table:table-cell>
          <table:covered-table-cell table:style-name="Default" office:value-type="string" calcext:value-type="string">
            <text:p>Contrato com Administração Pública</text:p>
          </table:covered-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Natureza do serviço:</text:p>
          </table:table-cell>
          <table:table-cell table:style-name="ce28" office:value-type="string" calcext:value-type="string">
            <text:p>Particular</text:p>
          </table:table-cell>
          <table:table-cell table:style-name="ce26" table:number-columns-repeated="1021"/>
          <table:table-cell table:style-name="ce26" office:value-type="string" calcext:value-type="string">
            <text:p><text:s/>= B2</text:p>
          </table:table-cell>
        </table:table-row>
        <table:table-row table:style-name="ro2">
          <table:table-cell table:style-name="ce17"/>
          <table:table-cell table:style-name="ce58"/>
          <table:table-cell table:style-name="ce26" table:number-columns-repeated="1022"/>
        </table:table-row>
        <table:table-row table:style-name="ro7">
          <table:table-cell table:style-name="ce18" office:value-type="string" calcext:value-type="string" table:number-columns-spanned="2" table:number-rows-spanned="1">
            <text:p>Identificação do Detentor</text:p>
          </table:table-cell>
          <table:covered-table-cell table:style-name="ce58"/>
          <table:table-cell table:style-name="ce26" table:number-columns-repeated="1022"/>
        </table:table-row>
        <table:table-row table:style-name="ro2">
          <table:table-cell table:style-name="ce19" office:value-type="string" calcext:value-type="string">
            <text:p>Tipo pessoa:</text:p>
            <draw:control table:end-cell-address="identificacao.B5" table:end-x="7.336cm" table:end-y="0.43cm" draw:z-index="3" draw:style-name="gr2" draw:text-style-name="P2" svg:width="7.34cm" svg:height="0.406cm" svg:x="5.986cm" svg:y="0.025cm" draw:control="control4"/>
          </table:table-cell>
          <table:table-cell table:style-name="ce29" office:value-type="string" calcext:value-type="string">
            <text:p>Física</text:p>
          </table:table-cell>
          <table:table-cell/>
          <table:table-cell table:style-name="ce26" table:number-columns-repeated="1021"/>
        </table:table-row>
        <table:table-row table:style-name="ro2">
          <table:table-cell table:style-name="ce19" office:value-type="string" calcext:value-type="string">
            <text:p>Nome:</text:p>
            <draw:control table:end-cell-address="identificacao.B7" table:end-x="7.336cm" table:end-y="0.413cm" draw:z-index="6" draw:style-name="gr3" draw:text-style-name="P1" svg:width="7.34cm" svg:height="0.547cm" svg:x="5.986cm" svg:y="0.424cm" draw:control="control7"/>
          </table:table-cell>
          <table:table-cell table:style-name="ce30" office:value-type="string" calcext:value-type="string">
            <text:p>GILBERTO GONCALVES ARAUJO JUNIOR</text:p>
          </table:table-cell>
          <table:table-cell table:style-name="ce26" table:number-columns-repeated="1022"/>
        </table:table-row>
        <table:table-row table:style-name="ro2">
          <table:table-cell table:style-name="ce19" office:value-type="string" calcext:value-type="string">
            <text:p>CPF:</text:p>
          </table:table-cell>
          <table:table-cell table:style-name="ce31" office:value-type="string" calcext:value-type="string">
            <text:p>048.778.385-97</text:p>
          </table:table-cell>
          <table:table-cell table:style-name="Default" table:number-columns-repeated="1022"/>
        </table:table-row>
        <table:table-row table:style-name="ro2">
          <table:table-cell table:style-name="ce58" table:number-columns-repeated="2"/>
          <table:table-cell table:style-name="ce26" table:number-columns-repeated="1022"/>
        </table:table-row>
        <table:table-row table:style-name="ro7">
          <table:table-cell table:style-name="ce21" office:value-type="string" calcext:value-type="string" table:number-columns-spanned="2" table:number-rows-spanned="1">
            <text:p>Identificação da Área</text:p>
          </table:table-cell>
          <table:covered-table-cell table:style-name="ce32"/>
          <table:table-cell table:style-name="ce26" table:number-columns-repeated="1022"/>
        </table:table-row>
        <table:table-row table:style-name="ro2">
          <table:table-cell table:style-name="ce22" office:value-type="string" calcext:value-type="string">
            <text:p>Denominação:</text:p>
          </table:table-cell>
          <table:table-cell table:style-name="ce33" office:value-type="string" calcext:value-type="string">
            <text:p>FAZENDA VIBRAÇÃO</text:p>
          </table:table-cell>
          <table:table-cell table:style-name="ce26" table:number-columns-repeated="1022"/>
        </table:table-row>
        <table:table-row table:style-name="ro2">
          <table:table-cell table:style-name="ce22" office:value-type="string" calcext:value-type="string">
            <text:p>Situação:</text:p>
            <draw:control table:end-cell-address="identificacao.B11" table:end-x="7.336cm" table:end-y="0.426cm" draw:z-index="1" draw:style-name="gr4" draw:text-style-name="P1" svg:width="7.34cm" svg:height="0.401cm" svg:x="5.986cm" svg:y="0.025cm" draw:control="control2"/>
            <draw:control table:end-cell-address="identificacao.B12" table:end-x="7.336cm" table:end-y="0.426cm" draw:z-index="2" draw:style-name="gr4" draw:text-style-name="P1" svg:width="7.34cm" svg:height="0.552cm" svg:x="5.986cm" svg:y="0.431cm" draw:control="control3"/>
          </table:table-cell>
          <table:table-cell table:style-name="ce33" office:value-type="string" calcext:value-type="string">
            <text:p>Imóvel Registrado</text:p>
          </table:table-cell>
          <table:table-cell table:style-name="ce26" table:number-columns-repeated="1022"/>
        </table:table-row>
        <table:table-row table:style-name="ro2">
          <table:table-cell table:style-name="ce22" office:value-type="string" calcext:value-type="string">
            <text:p>Natureza da área:</text:p>
          </table:table-cell>
          <table:table-cell table:style-name="ce33" office:value-type="string" calcext:value-type="string">
            <text:p>Particular</text:p>
          </table:table-cell>
          <table:table-cell table:style-name="ce26" table:number-columns-repeated="1022"/>
        </table:table-row>
        <table:table-row table:style-name="ro2">
          <table:table-cell table:style-name="ce23" office:value-type="string" calcext:value-type="string">
            <text:p>Código do Imóvel(SNCR/INCRA):</text:p>
          </table:table-cell>
          <table:table-cell table:style-name="ce33" office:value-type="string" calcext:value-type="string">
            <text:p>312.010.028.860-1</text:p>
          </table:table-cell>
          <table:table-cell table:style-name="ce26" table:number-columns-repeated="1022"/>
        </table:table-row>
        <table:table-row table:style-name="ro2">
          <table:table-cell table:style-name="ce22" office:value-type="string" calcext:value-type="string">
            <text:p>Código do cartório (CNS):</text:p>
          </table:table-cell>
          <table:table-cell table:style-name="ce34" office:value-type="string" calcext:value-type="string">
            <text:p>00.803-7</text:p>
          </table:table-cell>
          <table:table-cell table:style-name="ce26" table:number-columns-repeated="1022"/>
        </table:table-row>
        <table:table-row table:style-name="ro2">
          <table:table-cell table:style-name="ce24" table:content-validation-name="val1" office:value-type="string" calcext:value-type="string">
            <text:p>Matrícula:</text:p>
            <draw:control table:end-cell-address="identificacao.B15" table:end-x="0.005cm" table:end-y="0.42cm" draw:z-index="7" draw:style-name="gr5" draw:text-style-name="P3" svg:width="5.995cm" svg:height="0.419cm" svg:x="0cm" svg:y="0.001cm" draw:control="control8"/>
          </table:table-cell>
          <table:table-cell table:style-name="ce33" office:value-type="float" office:value="4490" calcext:value-type="float">
            <text:p>4490</text:p>
          </table:table-cell>
          <table:table-cell table:style-name="ce26" table:number-columns-repeated="1022"/>
        </table:table-row>
        <table:table-row table:style-name="ro2">
          <table:table-cell table:style-name="ce22" office:value-type="string" calcext:value-type="string">
            <text:p>Município(s):</text:p>
          </table:table-cell>
          <table:table-cell table:style-name="ce33">
            <draw:control table:end-cell-address="identificacao.B16" table:end-x="7.323cm" table:end-y="0.416cm" draw:z-index="4" draw:text-style-name="P4" svg:width="7.318cm" svg:height="0.381cm" svg:x="0.005cm" svg:y="0.035cm" draw:control="control5"/>
          </table:table-cell>
          <table:table-cell table:style-name="ce26" table:number-columns-repeated="1022"/>
        </table:table-row>
        <table:table-row table:style-name="ro2">
          <table:table-cell table:style-name="ce25" office:value-type="string" calcext:value-type="string">
            <text:p>Araci-BA</text:p>
            <draw:control table:end-cell-address="identificacao.B17" table:end-x="0.005cm" table:end-y="0.43cm" draw:z-index="5" draw:style-name="gr5" draw:text-style-name="P3" svg:width="5.995cm" svg:height="0.427cm" svg:x="0cm" svg:y="0.003cm" draw:control="control6"/>
          </table:table-cell>
          <table:table-cell table:style-name="ce33" office:value-type="string" calcext:value-type="string">
            <text:p>Araci-BA</text:p>
          </table:table-cell>
          <table:table-cell table:style-name="ce26" table:number-columns-repeated="1022"/>
        </table:table-row>
        <table:table-row table:style-name="ro3" table:visibility="collapse" table:number-rows-repeated="65496">
          <table:table-cell table:style-name="ce26" table:number-columns-repeated="1024"/>
        </table:table-row>
        <table:table-row table:style-name="ro3" table:visibility="collapse" table:number-rows-repeated="11">
          <table:table-cell table:style-name="ce26"/>
          <table:table-cell/>
          <table:table-cell table:style-name="ce26" table:number-columns-repeated="1022"/>
        </table:table-row>
        <table:table-row table:style-name="ro3" table:visibility="collapse" table:number-rows-repeated="983043">
          <table:table-cell table:number-columns-repeated="1024"/>
        </table:table-row>
        <table:table-row table:style-name="ro3" table:visibility="collapse" table:number-rows-repeated="3">
          <table:table-cell table:style-name="ce58" table:number-columns-repeated="2"/>
          <table:table-cell table:number-columns-repeated="1022"/>
        </table:table-row>
        <table:table-row table:style-name="ro8" table:visibility="collapse" table:number-rows-repeated="5">
          <table:table-cell table:style-name="ce58" table:number-columns-repeated="2"/>
          <table:table-cell table:number-columns-repeated="1022"/>
        </table:table-row>
        <table:table-row table:style-name="ro8" table:visibility="collapse">
          <table:table-cell table:style-name="ce58" table:number-columns-repeated="2"/>
          <table:table-cell table:number-columns-repeated="1022"/>
        </table:table-row>
      </table:table>
      <table:table table:name="perimetro_1" table:style-name="ta3" table:protected="true" table:protection-key="0JH//jgxM6fwuCNDEjKMbo8kKCw=" table:protection-key-digest-algorithm="http://www.w3.org/2000/09/xmldsig#sha1">
        <loext:table-protection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Hemisferio" form:control-implementation="ooo:com.sun.star.form.component.ListBox" xml:id="control9" form:id="control9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Sul" form:selected="true"/>
              <form:option form:label="Norte" form:current-selected="true"/>
            </form:listbox>
            <form:listbox form:name="lstMeridianos" form:control-implementation="ooo:com.sun.star.form.component.ListBox" xml:id="control10" form:id="control10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 -75"/>
              <form:option form:label=" -69"/>
              <form:option form:label=" -63" form:current-selected="true"/>
              <form:option form:label=" -57"/>
              <form:option form:label=" -51" form:selected="true"/>
              <form:option form:label=" -45"/>
              <form:option form:label=" -39"/>
              <form:option form:label=" -33"/>
            </form:listbox>
            <form:listbox form:name="lstTypeCoord" form:control-implementation="ooo:com.sun.star.form.component.ListBox" xml:id="control11" form:id="control11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UTM" form:selected="true"/>
              <form:option form:label="Geográfica" form:current-selected="true"/>
            </form:listbox>
            <form:formatted-text form:name="fieldParcelNumber" form:control-implementation="ooo:com.sun.star.form.component.PatternField" xml:id="control12" form:id="control12" form:tab-stop="true" form:current-value="001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"/>
                <form:property form:property-name="LiteralMask" office:value-type="string" office:string-value="000"/>
                <form:property form:property-name="MaxTextLen" office:value-type="float" office:value="3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Perimetro.initCellPerimeterNumber?language=Basic&amp;location=application" xlink:type="simple"/>
                <script:event-listener script:language="ooo:script" script:event-name="form:textchange" xlink:href="vnd.sun.star.script:Sigef.Perimetro.setCellPerimeterNumber?language=Basic&amp;location=application" xlink:type="simple"/>
              </office:event-listeners>
            </form:formatted-text>
            <form:listbox form:name="lstTypeSide" form:control-implementation="ooo:com.sun.star.form.component.ListBox" xml:id="control13" form:id="control13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Externo" form:current-selected="true" form:selected="true"/>
              <form:option form:label="Interno"/>
            </form:listbox>
          </form:form>
        </office:forms>
        <table:table-column table:style-name="co27" table:default-cell-style-name="ce42"/>
        <table:table-column table:style-name="co41" table:default-cell-style-name="ce50"/>
        <table:table-column table:style-name="co42" table:default-cell-style-name="ce50"/>
        <table:table-column table:style-name="co43" table:default-cell-style-name="ce50"/>
        <table:table-column table:style-name="co44" table:default-cell-style-name="ce50"/>
        <table:table-column table:style-name="co45" table:default-cell-style-name="ce50"/>
        <table:table-column table:style-name="co46" table:default-cell-style-name="ce50"/>
        <table:table-column table:style-name="co47" table:default-cell-style-name="ce42"/>
        <table:table-column table:style-name="co48" table:default-cell-style-name="ce124"/>
        <table:table-column table:style-name="co49" table:default-cell-style-name="ce124"/>
        <table:table-column table:style-name="co50" table:default-cell-style-name="ce124"/>
        <table:table-column table:style-name="co51" table:default-cell-style-name="ce42"/>
        <table:table-column table:style-name="co52" table:visibility="collapse" table:default-cell-style-name="ce27"/>
        <table:table-column table:style-name="co25" table:visibility="collapse" table:number-columns-repeated="1010" table:default-cell-style-name="ce27"/>
        <table:table-column table:style-name="co25" table:visibility="collapse" table:default-cell-style-name="Default"/>
        <table:table-row table:style-name="ro7">
          <table:table-cell table:style-name="ce35" office:value-type="string" calcext:value-type="string" table:number-columns-spanned="13" table:number-rows-spanned="1">
            <text:p>Tabela de Perímetro</text:p>
          </table:table-cell>
          <table:covered-table-cell table:style-name="ce43" office:value-type="string" calcext:value-type="string">
            <text:p>UTM</text:p>
          </table:covered-table-cell>
          <table:covered-table-cell table:style-name="ce51"/>
          <table:covered-table-cell table:style-name="ce43"/>
          <table:covered-table-cell table:style-name="ce51"/>
          <table:covered-table-cell table:number-columns-repeated="2" table:style-name="ce43"/>
          <table:covered-table-cell table:style-name="ce55"/>
          <table:covered-table-cell table:style-name="ce118" table:content-validation-name="val4"/>
          <table:covered-table-cell table:number-columns-repeated="2" table:style-name="ce118"/>
          <table:covered-table-cell table:number-columns-repeated="2" table:style-name="ce26"/>
          <table:table-cell table:style-name="ce26" table:number-columns-repeated="1011"/>
        </table:table-row>
        <table:table-row table:style-name="ro2">
          <table:table-cell table:style-name="ce58"/>
          <table:table-cell table:style-name="ce44" table:number-columns-repeated="6"/>
          <table:table-cell table:style-name="ce58"/>
          <table:table-cell table:style-name="ce119" table:content-validation-name="val4"/>
          <table:table-cell table:style-name="ce119" table:number-columns-repeated="2"/>
          <table:table-cell table:style-name="ce58" table:number-columns-repeated="2"/>
          <table:table-cell table:style-name="ce26" table:number-columns-repeated="1011"/>
        </table:table-row>
        <table:table-row table:style-name="ro2">
          <table:table-cell table:style-name="ce36" office:value-type="string" calcext:value-type="string">
            <text:p>Denominação:</text:p>
          </table:table-cell>
          <table:table-cell table:style-name="ce45" office:value-type="string" calcext:value-type="string">
            <text:p>Parte 1</text:p>
          </table:table-cell>
          <table:table-cell table:style-name="ce44" table:number-columns-repeated="5"/>
          <table:table-cell table:style-name="ce58"/>
          <table:table-cell table:style-name="ce119" table:content-validation-name="val4"/>
          <table:table-cell table:style-name="ce119" table:number-columns-repeated="2"/>
          <table:table-cell table:style-name="ce58"/>
          <table:table-cell table:style-name="ce26" table:number-columns-repeated="1012"/>
        </table:table-row>
        <table:table-row table:style-name="ro2">
          <table:table-cell table:style-name="ce37" office:value-type="string" calcext:value-type="string">
            <text:p>Parcela número:</text:p>
          </table:table-cell>
          <table:table-cell table:style-name="ce46" office:value-type="string" calcext:value-type="string">
            <text:p>001</text:p>
            <draw:control table:end-cell-address="perimetro_1.B4" table:end-x="2.596cm" table:end-y="0.431cm" draw:z-index="3" draw:style-name="gr4" draw:text-style-name="P1" svg:width="2.596cm" svg:height="0.404cm" svg:x="0cm" svg:y="0.027cm" draw:control="control12"/>
          </table:table-cell>
          <table:table-cell table:style-name="ce44" office:value-type="string" calcext:value-type="string">
            <text:p><text:s/></text:p>
          </table:table-cell>
          <table:table-cell table:style-name="ce44" table:number-columns-repeated="4"/>
          <table:table-cell table:style-name="ce58"/>
          <table:table-cell table:style-name="ce119" table:content-validation-name="val4"/>
          <table:table-cell table:style-name="ce119" table:number-columns-repeated="2"/>
          <table:table-cell table:style-name="ce58"/>
          <table:table-cell table:style-name="ce26" table:number-columns-repeated="1012"/>
        </table:table-row>
        <table:table-row table:style-name="ro2">
          <table:table-cell table:style-name="ce37" office:value-type="string" calcext:value-type="string">
            <text:p>Lado:</text:p>
          </table:table-cell>
          <table:table-cell table:style-name="ce46" office:value-type="string" calcext:value-type="string">
            <text:p>Externo</text:p>
            <draw:control table:end-cell-address="perimetro_1.B5" table:end-x="2.609cm" table:end-y="0.428cm" draw:z-index="4" draw:style-name="gr4" draw:text-style-name="P1" svg:width="2.61cm" svg:height="0.428cm" svg:x="-0.001cm" svg:y="0cm" draw:control="control13"/>
          </table:table-cell>
          <table:table-cell table:style-name="ce44" table:number-columns-repeated="5"/>
          <table:table-cell table:style-name="ce58"/>
          <table:table-cell table:style-name="ce119" table:content-validation-name="val4"/>
          <table:table-cell table:style-name="ce119" table:number-columns-repeated="2"/>
          <table:table-cell table:style-name="ce58"/>
          <table:table-cell table:style-name="ce26" table:number-columns-repeated="1012"/>
        </table:table-row>
        <table:table-row table:style-name="ro2">
          <table:table-cell table:style-name="ce58"/>
          <table:table-cell table:style-name="ce44" table:number-columns-repeated="6"/>
          <table:table-cell table:style-name="ce58"/>
          <table:table-cell table:style-name="ce119" table:content-validation-name="val4"/>
          <table:table-cell table:style-name="ce119" table:number-columns-repeated="2"/>
          <table:table-cell table:style-name="ce58"/>
          <table:table-cell table:style-name="ce26" table:number-columns-repeated="1012"/>
        </table:table-row>
        <table:table-row table:style-name="ro2">
          <table:table-cell table:style-name="ce77" office:value-type="string" calcext:value-type="string" table:number-columns-spanned="1" table:number-rows-spanned="2">
            <text:p>Sistema de referência SIRGAS2000</text:p>
          </table:table-cell>
          <table:table-cell table:style-name="ce44"/>
          <table:table-cell table:style-name="ce52"/>
          <table:table-cell table:style-name="ce44" table:number-columns-repeated="4"/>
          <table:table-cell table:style-name="ce58"/>
          <table:table-cell table:style-name="ce119" table:content-validation-name="val4"/>
          <table:table-cell table:style-name="ce119" table:number-columns-repeated="2"/>
          <table:table-cell table:style-name="ce58"/>
          <table:table-cell table:style-name="ce26" table:number-columns-repeated="1012"/>
        </table:table-row>
        <table:table-row table:style-name="ro2">
          <table:covered-table-cell table:style-name="ce58"/>
          <table:table-cell table:style-name="ce44">
            <draw:control table:end-cell-address="perimetro_1.B9" table:end-x="2.609cm" table:end-y="0.426cm" draw:z-index="2" draw:style-name="gr1" draw:text-style-name="P1" svg:width="2.61cm" svg:height="0.558cm" svg:x="-0.001cm" svg:y="0.425cm" draw:control="control11"/>
          </table:table-cell>
          <table:table-cell table:style-name="ce44"/>
          <table:table-cell table:style-name="ce44">
            <draw:control table:end-cell-address="perimetro_1.E9" table:end-x="0.009cm" table:end-y="0.426cm" draw:z-index="1" draw:style-name="gr1" draw:text-style-name="P1" svg:width="2.433cm" svg:height="0.558cm" svg:x="0.005cm" svg:y="0.425cm" draw:control="control10"/>
          </table:table-cell>
          <table:table-cell table:style-name="ce44">
            <draw:control table:end-cell-address="perimetro_1.F9" table:end-x="2.013cm" table:end-y="0.426cm" draw:z-index="0" draw:style-name="gr1" draw:text-style-name="P1" svg:width="2.037cm" svg:height="0.558cm" svg:x="2.01cm" svg:y="0.425cm" draw:control="control9"/>
          </table:table-cell>
          <table:table-cell table:style-name="ce44" table:number-columns-repeated="2"/>
          <table:table-cell table:style-name="ce58"/>
          <table:table-cell table:style-name="ce119" table:content-validation-name="val4"/>
          <table:table-cell table:style-name="ce119" table:number-columns-repeated="2"/>
          <table:table-cell table:style-name="ce58"/>
          <table:table-cell table:style-name="ce26" table:number-columns-repeated="1012"/>
        </table:table-row>
        <table:table-row table:style-name="ro10">
          <table:table-cell table:style-name="ce77" office:value-type="string" calcext:value-type="string">
            <text:p>Tipo de Coordenada:</text:p>
          </table:table-cell>
          <table:table-cell table:style-name="ce47" office:value-type="string" calcext:value-type="string">
            <text:p>Geográfica</text:p>
          </table:table-cell>
          <table:table-cell table:style-name="ce53" office:value-type="string" calcext:value-type="string">
            <text:p>Meridiano Central (°):</text:p>
          </table:table-cell>
          <table:table-cell table:style-name="ce123" office:value-type="string" calcext:value-type="string">
            <text:p>39</text:p>
          </table:table-cell>
          <table:table-cell table:style-name="ce53" office:value-type="string" calcext:value-type="string">
            <text:p>Hemisfério:</text:p>
          </table:table-cell>
          <table:table-cell table:style-name="ce47" office:value-type="string" calcext:value-type="string">
            <text:p>Norte</text:p>
          </table:table-cell>
          <table:table-cell table:style-name="ce44"/>
          <table:table-cell table:style-name="ce58"/>
          <table:table-cell table:style-name="ce119" table:content-validation-name="val4"/>
          <table:table-cell table:style-name="ce119" table:number-columns-repeated="2"/>
          <table:table-cell table:style-name="ce58"/>
          <table:table-cell table:style-name="ce26" table:number-columns-repeated="1012"/>
        </table:table-row>
        <table:table-row table:style-name="ro2">
          <table:table-cell table:style-name="ce58"/>
          <table:table-cell table:style-name="ce44" table:number-columns-repeated="6"/>
          <table:table-cell table:style-name="ce58"/>
          <table:table-cell table:style-name="ce119" table:content-validation-name="val4"/>
          <table:table-cell table:style-name="ce78" table:content-validation-name="val2" office:value-type="string" calcext:value-type="string" table:number-columns-spanned="3" table:number-rows-spanned="1">
            <text:p>Confrontante</text:p>
          </table:table-cell>
          <table:covered-table-cell table:style-name="ce79"/>
          <table:covered-table-cell table:style-name="ce80"/>
          <table:table-cell table:style-name="ce26" table:number-columns-repeated="1012"/>
        </table:table-row>
        <table:table-row table:style-name="ro2">
          <table:table-cell table:style-name="ce39" table:content-validation-name="val2" office:value-type="string" calcext:value-type="string">
            <text:p>Vértice</text:p>
          </table:table-cell>
          <table:table-cell table:style-name="ce48" table:content-validation-name="val2" office:value-type="string" calcext:value-type="string">
            <text:p>E/Long</text:p>
          </table:table-cell>
          <table:table-cell table:style-name="ce48" table:content-validation-name="val2" office:value-type="string" calcext:value-type="string">
            <text:p>Sigma long</text:p>
          </table:table-cell>
          <table:table-cell table:style-name="ce48" table:content-validation-name="val2" office:value-type="string" calcext:value-type="string">
            <text:p>N/Lat</text:p>
          </table:table-cell>
          <table:table-cell table:style-name="ce48" table:content-validation-name="val2" office:value-type="string" calcext:value-type="string">
            <text:p>Sigma lat</text:p>
          </table:table-cell>
          <table:table-cell table:style-name="ce48" table:content-validation-name="val2" office:value-type="string" calcext:value-type="string">
            <text:p>h</text:p>
          </table:table-cell>
          <table:table-cell table:style-name="ce48" table:content-validation-name="val2" office:value-type="string" calcext:value-type="string">
            <text:p>Sigma h</text:p>
          </table:table-cell>
          <table:table-cell table:style-name="ce70" office:value-type="string" calcext:value-type="string">
            <text:p>Método Posicionamento</text:p>
          </table:table-cell>
          <table:table-cell table:style-name="ce120" table:content-validation-name="val4" office:value-type="string" calcext:value-type="string">
            <text:p>Tipo Limite</text:p>
          </table:table-cell>
          <table:table-cell table:style-name="ce120" table:content-validation-name="val2" office:value-type="string" calcext:value-type="string">
            <text:p>CNS</text:p>
          </table:table-cell>
          <table:table-cell table:style-name="ce120" table:content-validation-name="val2" office:value-type="string" calcext:value-type="string">
            <text:p>Matrícula</text:p>
          </table:table-cell>
          <table:table-cell table:style-name="ce120" table:content-validation-name="val2" office:value-type="string" calcext:value-type="string">
            <text:p>Descritivo</text:p>
          </table:table-cell>
          <table:table-cell table:style-name="ce26" table:number-columns-repeated="1010"/>
          <table:table-cell table:style-name="Default"/>
          <table:table-cell/>
        </table:table-row>
        <table:table-row table:style-name="ro2">
          <table:table-cell table:style-name="ce106" office:value-type="string" calcext:value-type="string">
            <text:p>DSBN-M-3605</text:p>
          </table:table-cell>
          <table:table-cell table:style-name="ce117" office:value-type="string" calcext:value-type="string">
            <text:p>39 5 04,737 W</text:p>
          </table:table-cell>
          <table:table-cell table:style-name="ce88" office:value-type="float" office:value="0.0064" calcext:value-type="float">
            <text:p>0,0064</text:p>
          </table:table-cell>
          <table:table-cell table:style-name="ce117" office:value-type="string" calcext:value-type="string">
            <text:p>11 23 44,344 S</text:p>
          </table:table-cell>
          <table:table-cell table:style-name="ce88" office:value-type="float" office:value="0.0064" calcext:value-type="float">
            <text:p>0,0064</text:p>
          </table:table-cell>
          <table:table-cell table:style-name="ce88" office:value-type="float" office:value="300.051" calcext:value-type="float">
            <text:p>300,051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.403/CNS.00.803-7) FAZENDA TERRA NOVA\ CARLOS MATOS DE LIMA\ CPF:39752186572\ DIVALDO JOSE MATOS DE LIMA\ CPF:18024629534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30</text:p>
          </table:table-cell>
          <table:table-cell table:style-name="ce117" office:value-type="string" calcext:value-type="string">
            <text:p>39 5 03,926 W</text:p>
          </table:table-cell>
          <table:table-cell table:style-name="ce88" office:value-type="float" office:value="0.0059" calcext:value-type="float">
            <text:p>0,0059</text:p>
          </table:table-cell>
          <table:table-cell table:style-name="ce117" office:value-type="string" calcext:value-type="string">
            <text:p>11 23 44,996 S</text:p>
          </table:table-cell>
          <table:table-cell table:style-name="ce88" office:value-type="float" office:value="0.0059" calcext:value-type="float">
            <text:p>0,0059</text:p>
          </table:table-cell>
          <table:table-cell table:style-name="ce88" office:value-type="float" office:value="299.644" calcext:value-type="float">
            <text:p>299,644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.403/CNS.00.803-7) FAZENDA TERRA NOVA\ CARLOS MATOS DE LIMA\ CPF:39752186572\ DIVALDO JOSE MATOS DE LIMA\ CPF:18024629534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31</text:p>
          </table:table-cell>
          <table:table-cell table:style-name="ce117" office:value-type="string" calcext:value-type="string">
            <text:p>39 5 02,765 W</text:p>
          </table:table-cell>
          <table:table-cell table:style-name="ce88" office:value-type="float" office:value="0.0068" calcext:value-type="float">
            <text:p>0,0068</text:p>
          </table:table-cell>
          <table:table-cell table:style-name="ce117" office:value-type="string" calcext:value-type="string">
            <text:p>11 23 45,995 S</text:p>
          </table:table-cell>
          <table:table-cell table:style-name="ce88" office:value-type="float" office:value="0.0068" calcext:value-type="float">
            <text:p>0,0068</text:p>
          </table:table-cell>
          <table:table-cell table:style-name="ce88" office:value-type="float" office:value="301.859" calcext:value-type="float">
            <text:p>301,859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.403/CNS.00.803-7) FAZENDA TERRA NOVA\ CARLOS MATOS DE LIMA\ CPF:39752186572\ DIVALDO JOSE MATOS DE LIMA\ CPF:18024629534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32</text:p>
          </table:table-cell>
          <table:table-cell table:style-name="ce117" office:value-type="string" calcext:value-type="string">
            <text:p>39 5 01,928 W</text:p>
          </table:table-cell>
          <table:table-cell table:style-name="ce88" office:value-type="float" office:value="0.0028" calcext:value-type="float">
            <text:p>0,0028</text:p>
          </table:table-cell>
          <table:table-cell table:style-name="ce117" office:value-type="string" calcext:value-type="string">
            <text:p>11 23 46,683 S</text:p>
          </table:table-cell>
          <table:table-cell table:style-name="ce88" office:value-type="float" office:value="0.0028" calcext:value-type="float">
            <text:p>0,0028</text:p>
          </table:table-cell>
          <table:table-cell table:style-name="ce88" office:value-type="float" office:value="299.439" calcext:value-type="float">
            <text:p>299,439</text:p>
          </table:table-cell>
          <table:table-cell table:style-name="ce88" office:value-type="float" office:value="0.006" calcext:value-type="float">
            <text:p>0,006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.403/CNS.00.803-7) FAZENDA TERRA NOVA\ CARLOS MATOS DE LIMA\ CPF:39752186572\ DIVALDO JOSE MATOS DE LIMA\ CPF:18024629534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33</text:p>
          </table:table-cell>
          <table:table-cell table:style-name="ce117" office:value-type="string" calcext:value-type="string">
            <text:p>39 5 00,833 W</text:p>
          </table:table-cell>
          <table:table-cell table:style-name="ce88" office:value-type="float" office:value="0.0033" calcext:value-type="float">
            <text:p>0,0033</text:p>
          </table:table-cell>
          <table:table-cell table:style-name="ce117" office:value-type="string" calcext:value-type="string">
            <text:p>11 23 47,592 S</text:p>
          </table:table-cell>
          <table:table-cell table:style-name="ce88" office:value-type="float" office:value="0.0033" calcext:value-type="float">
            <text:p>0,0033</text:p>
          </table:table-cell>
          <table:table-cell table:style-name="ce88" office:value-type="float" office:value="297.108" calcext:value-type="float">
            <text:p>297,108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.403/CNS.00.803-7) FAZENDA TERRA NOVA\ CARLOS MATOS DE LIMA\ CPF:39752186572\ DIVALDO JOSE MATOS DE LIMA\ CPF:18024629534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34</text:p>
          </table:table-cell>
          <table:table-cell table:style-name="ce117" office:value-type="string" calcext:value-type="string">
            <text:p>39 5 00,213 W</text:p>
          </table:table-cell>
          <table:table-cell table:style-name="ce88" office:value-type="float" office:value="0.0077" calcext:value-type="float">
            <text:p>0,0077</text:p>
          </table:table-cell>
          <table:table-cell table:style-name="ce117" office:value-type="string" calcext:value-type="string">
            <text:p>11 23 48,110 S</text:p>
          </table:table-cell>
          <table:table-cell table:style-name="ce88" office:value-type="float" office:value="0.0077" calcext:value-type="float">
            <text:p>0,0077</text:p>
          </table:table-cell>
          <table:table-cell table:style-name="ce88" office:value-type="float" office:value="297.32" calcext:value-type="float">
            <text:p>297,32</text:p>
          </table:table-cell>
          <table:table-cell table:style-name="ce88" office:value-type="float" office:value="0.0147" calcext:value-type="float">
            <text:p>0,014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.403/CNS.00.803-7) FAZENDA TERRA NOVA\ CARLOS MATOS DE LIMA\ CPF:39752186572\ DIVALDO JOSE MATOS DE LIMA\ CPF:18024629534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M-3607</text:p>
          </table:table-cell>
          <table:table-cell table:style-name="ce117" office:value-type="string" calcext:value-type="string">
            <text:p>39 4 58,949 W</text:p>
          </table:table-cell>
          <table:table-cell table:style-name="ce88" office:value-type="float" office:value="0.0028" calcext:value-type="float">
            <text:p>0,0028</text:p>
          </table:table-cell>
          <table:table-cell table:style-name="ce117" office:value-type="string" calcext:value-type="string">
            <text:p>11 23 49,168 S</text:p>
          </table:table-cell>
          <table:table-cell table:style-name="ce88" office:value-type="float" office:value="0.0028" calcext:value-type="float">
            <text:p>0,0028</text:p>
          </table:table-cell>
          <table:table-cell table:style-name="ce88" office:value-type="float" office:value="299.656" calcext:value-type="float">
            <text:p>299,656</text:p>
          </table:table-cell>
          <table:table-cell table:style-name="ce88" office:value-type="float" office:value="0.006" calcext:value-type="float">
            <text:p>0,006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POSSE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35</text:p>
          </table:table-cell>
          <table:table-cell table:style-name="ce117" office:value-type="string" calcext:value-type="string">
            <text:p>39 4 57,183 W</text:p>
          </table:table-cell>
          <table:table-cell table:style-name="ce88" office:value-type="float" office:value="0.0031" calcext:value-type="float">
            <text:p>0,0031</text:p>
          </table:table-cell>
          <table:table-cell table:style-name="ce117" office:value-type="string" calcext:value-type="string">
            <text:p>11 23 50,641 S</text:p>
          </table:table-cell>
          <table:table-cell table:style-name="ce88" office:value-type="float" office:value="0.0031" calcext:value-type="float">
            <text:p>0,0031</text:p>
          </table:table-cell>
          <table:table-cell table:style-name="ce88" office:value-type="float" office:value="304.709" calcext:value-type="float">
            <text:p>304,709</text:p>
          </table:table-cell>
          <table:table-cell table:style-name="ce88" office:value-type="float" office:value="0.006" calcext:value-type="float">
            <text:p>0,006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POSSE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36</text:p>
          </table:table-cell>
          <table:table-cell table:style-name="ce117" office:value-type="string" calcext:value-type="string">
            <text:p>39 4 55,418 W</text:p>
          </table:table-cell>
          <table:table-cell table:style-name="ce88" office:value-type="float" office:value="0.0031" calcext:value-type="float">
            <text:p>0,0031</text:p>
          </table:table-cell>
          <table:table-cell table:style-name="ce117" office:value-type="string" calcext:value-type="string">
            <text:p>11 23 52,225 S</text:p>
          </table:table-cell>
          <table:table-cell table:style-name="ce88" office:value-type="float" office:value="0.0031" calcext:value-type="float">
            <text:p>0,0031</text:p>
          </table:table-cell>
          <table:table-cell table:style-name="ce88" office:value-type="float" office:value="304.414" calcext:value-type="float">
            <text:p>304,414</text:p>
          </table:table-cell>
          <table:table-cell table:style-name="ce88" office:value-type="float" office:value="0.0073" calcext:value-type="float">
            <text:p>0,007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POSSE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37</text:p>
          </table:table-cell>
          <table:table-cell table:style-name="ce117" office:value-type="string" calcext:value-type="string">
            <text:p>39 4 54,524 W</text:p>
          </table:table-cell>
          <table:table-cell table:style-name="ce88" office:value-type="float" office:value="0.0102" calcext:value-type="float">
            <text:p>0,0102</text:p>
          </table:table-cell>
          <table:table-cell table:style-name="ce117" office:value-type="string" calcext:value-type="string">
            <text:p>11 23 53,100 S</text:p>
          </table:table-cell>
          <table:table-cell table:style-name="ce88" office:value-type="float" office:value="0.0102" calcext:value-type="float">
            <text:p>0,0102</text:p>
          </table:table-cell>
          <table:table-cell table:style-name="ce88" office:value-type="float" office:value="302.858" calcext:value-type="float">
            <text:p>302,858</text:p>
          </table:table-cell>
          <table:table-cell table:style-name="ce88" office:value-type="float" office:value="0.0237" calcext:value-type="float">
            <text:p>0,023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POSSE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38</text:p>
          </table:table-cell>
          <table:table-cell table:style-name="ce117" office:value-type="string" calcext:value-type="string">
            <text:p>39 4 53,220 W</text:p>
          </table:table-cell>
          <table:table-cell table:style-name="ce88" office:value-type="float" office:value="0.0064" calcext:value-type="float">
            <text:p>0,0064</text:p>
          </table:table-cell>
          <table:table-cell table:style-name="ce117" office:value-type="string" calcext:value-type="string">
            <text:p>11 23 54,389 S</text:p>
          </table:table-cell>
          <table:table-cell table:style-name="ce88" office:value-type="float" office:value="0.0064" calcext:value-type="float">
            <text:p>0,0064</text:p>
          </table:table-cell>
          <table:table-cell table:style-name="ce88" office:value-type="float" office:value="302.235" calcext:value-type="float">
            <text:p>302,235</text:p>
          </table:table-cell>
          <table:table-cell table:style-name="ce88" office:value-type="float" office:value="0.0147" calcext:value-type="float">
            <text:p>0,014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POSSE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M-3606</text:p>
          </table:table-cell>
          <table:table-cell table:style-name="ce117" office:value-type="string" calcext:value-type="string">
            <text:p>39 4 51,912 W</text:p>
          </table:table-cell>
          <table:table-cell table:style-name="ce88" office:value-type="float" office:value="0.0071" calcext:value-type="float">
            <text:p>0,0071</text:p>
          </table:table-cell>
          <table:table-cell table:style-name="ce117" office:value-type="string" calcext:value-type="string">
            <text:p>11 23 55,693 S</text:p>
          </table:table-cell>
          <table:table-cell table:style-name="ce88" office:value-type="float" office:value="0.0071" calcext:value-type="float">
            <text:p>0,0071</text:p>
          </table:table-cell>
          <table:table-cell table:style-name="ce88" office:value-type="float" office:value="305.196" calcext:value-type="float">
            <text:p>305,196</text:p>
          </table:table-cell>
          <table:table-cell table:style-name="ce88" office:value-type="float" office:value="0.0193" calcext:value-type="float">
            <text:p>0,019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39</text:p>
          </table:table-cell>
          <table:table-cell table:style-name="ce117" office:value-type="string" calcext:value-type="string">
            <text:p>39 4 50,553 W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117" office:value-type="string" calcext:value-type="string">
            <text:p>11 23 57,097 S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88" office:value-type="float" office:value="305.859" calcext:value-type="float">
            <text:p>305,859</text:p>
          </table:table-cell>
          <table:table-cell table:style-name="ce88" office:value-type="float" office:value="0.0123" calcext:value-type="float">
            <text:p>0,012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40</text:p>
          </table:table-cell>
          <table:table-cell table:style-name="ce117" office:value-type="string" calcext:value-type="string">
            <text:p>39 4 49,172 W</text:p>
          </table:table-cell>
          <table:table-cell table:style-name="ce88" office:value-type="float" office:value="0.0064" calcext:value-type="float">
            <text:p>0,0064</text:p>
          </table:table-cell>
          <table:table-cell table:style-name="ce117" office:value-type="string" calcext:value-type="string">
            <text:p>11 23 58,689 S</text:p>
          </table:table-cell>
          <table:table-cell table:style-name="ce88" office:value-type="float" office:value="0.0064" calcext:value-type="float">
            <text:p>0,0064</text:p>
          </table:table-cell>
          <table:table-cell table:style-name="ce88" office:value-type="float" office:value="302.002" calcext:value-type="float">
            <text:p>302,002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41</text:p>
          </table:table-cell>
          <table:table-cell table:style-name="ce117" office:value-type="string" calcext:value-type="string">
            <text:p>39 4 48,235 W</text:p>
          </table:table-cell>
          <table:table-cell table:style-name="ce88" office:value-type="float" office:value="0.0061" calcext:value-type="float">
            <text:p>0,0061</text:p>
          </table:table-cell>
          <table:table-cell table:style-name="ce117" office:value-type="string" calcext:value-type="string">
            <text:p>11 24 00,035 S</text:p>
          </table:table-cell>
          <table:table-cell table:style-name="ce88" office:value-type="float" office:value="0.0061" calcext:value-type="float">
            <text:p>0,0061</text:p>
          </table:table-cell>
          <table:table-cell table:style-name="ce88" office:value-type="float" office:value="295.968" calcext:value-type="float">
            <text:p>295,968</text:p>
          </table:table-cell>
          <table:table-cell table:style-name="ce88" office:value-type="float" office:value="0.012" calcext:value-type="float">
            <text:p>0,012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42</text:p>
          </table:table-cell>
          <table:table-cell table:style-name="ce117" office:value-type="string" calcext:value-type="string">
            <text:p>39 4 47,355 W</text:p>
          </table:table-cell>
          <table:table-cell table:style-name="ce88" office:value-type="float" office:value="0.0191" calcext:value-type="float">
            <text:p>0,0191</text:p>
          </table:table-cell>
          <table:table-cell table:style-name="ce117" office:value-type="string" calcext:value-type="string">
            <text:p>11 24 01,102 S</text:p>
          </table:table-cell>
          <table:table-cell table:style-name="ce88" office:value-type="float" office:value="0.0191" calcext:value-type="float">
            <text:p>0,0191</text:p>
          </table:table-cell>
          <table:table-cell table:style-name="ce88" office:value-type="float" office:value="287.199" calcext:value-type="float">
            <text:p>287,199</text:p>
          </table:table-cell>
          <table:table-cell table:style-name="ce88" office:value-type="float" office:value="0.0473" calcext:value-type="float">
            <text:p>0,047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43</text:p>
          </table:table-cell>
          <table:table-cell table:style-name="ce117" office:value-type="string" calcext:value-type="string">
            <text:p>39 4 45,897 W</text:p>
          </table:table-cell>
          <table:table-cell table:style-name="ce88" office:value-type="float" office:value="0.0054" calcext:value-type="float">
            <text:p>0,0054</text:p>
          </table:table-cell>
          <table:table-cell table:style-name="ce117" office:value-type="string" calcext:value-type="string">
            <text:p>11 24 02,869 S</text:p>
          </table:table-cell>
          <table:table-cell table:style-name="ce88" office:value-type="float" office:value="0.0054" calcext:value-type="float">
            <text:p>0,0054</text:p>
          </table:table-cell>
          <table:table-cell table:style-name="ce88" office:value-type="float" office:value="292.186" calcext:value-type="float">
            <text:p>292,186</text:p>
          </table:table-cell>
          <table:table-cell table:style-name="ce88" office:value-type="float" office:value="0.0123" calcext:value-type="float">
            <text:p>0,012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44</text:p>
          </table:table-cell>
          <table:table-cell table:style-name="ce117" office:value-type="string" calcext:value-type="string">
            <text:p>39 4 44,824 W</text:p>
          </table:table-cell>
          <table:table-cell table:style-name="ce88" office:value-type="float" office:value="0.0045" calcext:value-type="float">
            <text:p>0,0045</text:p>
          </table:table-cell>
          <table:table-cell table:style-name="ce117" office:value-type="string" calcext:value-type="string">
            <text:p>11 24 03,809 S</text:p>
          </table:table-cell>
          <table:table-cell table:style-name="ce88" office:value-type="float" office:value="0.0045" calcext:value-type="float">
            <text:p>0,0045</text:p>
          </table:table-cell>
          <table:table-cell table:style-name="ce88" office:value-type="float" office:value="293.945" calcext:value-type="float">
            <text:p>293,945</text:p>
          </table:table-cell>
          <table:table-cell table:style-name="ce88" office:value-type="float" office:value="0.0093" calcext:value-type="float">
            <text:p>0,009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45</text:p>
          </table:table-cell>
          <table:table-cell table:style-name="ce117" office:value-type="string" calcext:value-type="string">
            <text:p>39 4 44,605 W</text:p>
          </table:table-cell>
          <table:table-cell table:style-name="ce88" office:value-type="float" office:value="0.0107" calcext:value-type="float">
            <text:p>0,0107</text:p>
          </table:table-cell>
          <table:table-cell table:style-name="ce117" office:value-type="string" calcext:value-type="string">
            <text:p>11 24 04,212 S</text:p>
          </table:table-cell>
          <table:table-cell table:style-name="ce88" office:value-type="float" office:value="0.0107" calcext:value-type="float">
            <text:p>0,0107</text:p>
          </table:table-cell>
          <table:table-cell table:style-name="ce88" office:value-type="float" office:value="294.127" calcext:value-type="float">
            <text:p>294,127</text:p>
          </table:table-cell>
          <table:table-cell table:style-name="ce88" office:value-type="float" office:value="0.0257" calcext:value-type="float">
            <text:p>0,025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46</text:p>
          </table:table-cell>
          <table:table-cell table:style-name="ce117" office:value-type="string" calcext:value-type="string">
            <text:p>39 4 43,234 W</text:p>
          </table:table-cell>
          <table:table-cell table:style-name="ce88" office:value-type="float" office:value="0.0036" calcext:value-type="float">
            <text:p>0,0036</text:p>
          </table:table-cell>
          <table:table-cell table:style-name="ce117" office:value-type="string" calcext:value-type="string">
            <text:p>11 24 07,392 S</text:p>
          </table:table-cell>
          <table:table-cell table:style-name="ce88" office:value-type="float" office:value="0.0036" calcext:value-type="float">
            <text:p>0,0036</text:p>
          </table:table-cell>
          <table:table-cell table:style-name="ce88" office:value-type="float" office:value="294.727" calcext:value-type="float">
            <text:p>294,727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47</text:p>
          </table:table-cell>
          <table:table-cell table:style-name="ce117" office:value-type="string" calcext:value-type="string">
            <text:p>39 4 41,384 W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117" office:value-type="string" calcext:value-type="string">
            <text:p>11 24 11,134 S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88" office:value-type="float" office:value="287.335" calcext:value-type="float">
            <text:p>287,335</text:p>
          </table:table-cell>
          <table:table-cell table:style-name="ce88" office:value-type="float" office:value="0.012" calcext:value-type="float">
            <text:p>0,012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48</text:p>
          </table:table-cell>
          <table:table-cell table:style-name="ce117" office:value-type="string" calcext:value-type="string">
            <text:p>39 4 41,134 W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117" office:value-type="string" calcext:value-type="string">
            <text:p>11 24 11,847 S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88" office:value-type="float" office:value="287.504" calcext:value-type="float">
            <text:p>287,504</text:p>
          </table:table-cell>
          <table:table-cell table:style-name="ce88" office:value-type="float" office:value="0.0113" calcext:value-type="float">
            <text:p>0,011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49</text:p>
          </table:table-cell>
          <table:table-cell table:style-name="ce117" office:value-type="string" calcext:value-type="string">
            <text:p>39 4 40,840 W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117" office:value-type="string" calcext:value-type="string">
            <text:p>11 24 12,922 S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88" office:value-type="float" office:value="287.429" calcext:value-type="float">
            <text:p>287,429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50</text:p>
          </table:table-cell>
          <table:table-cell table:style-name="ce117" office:value-type="string" calcext:value-type="string">
            <text:p>39 4 40,487 W</text:p>
          </table:table-cell>
          <table:table-cell table:style-name="ce88" office:value-type="float" office:value="0.0111" calcext:value-type="float">
            <text:p>0,0111</text:p>
          </table:table-cell>
          <table:table-cell table:style-name="ce117" office:value-type="string" calcext:value-type="string">
            <text:p>11 24 14,212 S</text:p>
          </table:table-cell>
          <table:table-cell table:style-name="ce88" office:value-type="float" office:value="0.0111" calcext:value-type="float">
            <text:p>0,0111</text:p>
          </table:table-cell>
          <table:table-cell table:style-name="ce88" office:value-type="float" office:value="287.867" calcext:value-type="float">
            <text:p>287,867</text:p>
          </table:table-cell>
          <table:table-cell table:style-name="ce88" office:value-type="float" office:value="0.028" calcext:value-type="float">
            <text:p>0,028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51</text:p>
          </table:table-cell>
          <table:table-cell table:style-name="ce117" office:value-type="string" calcext:value-type="string">
            <text:p>39 4 40,264 W</text:p>
          </table:table-cell>
          <table:table-cell table:style-name="ce88" office:value-type="float" office:value="0.0064" calcext:value-type="float">
            <text:p>0,0064</text:p>
          </table:table-cell>
          <table:table-cell table:style-name="ce117" office:value-type="string" calcext:value-type="string">
            <text:p>11 24 14,964 S</text:p>
          </table:table-cell>
          <table:table-cell table:style-name="ce88" office:value-type="float" office:value="0.0064" calcext:value-type="float">
            <text:p>0,0064</text:p>
          </table:table-cell>
          <table:table-cell table:style-name="ce88" office:value-type="float" office:value="287.949" calcext:value-type="float">
            <text:p>287,949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52</text:p>
          </table:table-cell>
          <table:table-cell table:style-name="ce117" office:value-type="string" calcext:value-type="string">
            <text:p>39 4 39,750 W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117" office:value-type="string" calcext:value-type="string">
            <text:p>11 24 16,711 S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88" office:value-type="float" office:value="287.798" calcext:value-type="float">
            <text:p>287,798</text:p>
          </table:table-cell>
          <table:table-cell table:style-name="ce88" office:value-type="float" office:value="0.0193" calcext:value-type="float">
            <text:p>0,019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53</text:p>
          </table:table-cell>
          <table:table-cell table:style-name="ce117" office:value-type="string" calcext:value-type="string">
            <text:p>39 4 39,899 W</text:p>
          </table:table-cell>
          <table:table-cell table:style-name="ce88" office:value-type="float" office:value="0.0139" calcext:value-type="float">
            <text:p>0,0139</text:p>
          </table:table-cell>
          <table:table-cell table:style-name="ce117" office:value-type="string" calcext:value-type="string">
            <text:p>11 24 16,805 S</text:p>
          </table:table-cell>
          <table:table-cell table:style-name="ce88" office:value-type="float" office:value="0.0139" calcext:value-type="float">
            <text:p>0,0139</text:p>
          </table:table-cell>
          <table:table-cell table:style-name="ce88" office:value-type="float" office:value="287.975" calcext:value-type="float">
            <text:p>287,975</text:p>
          </table:table-cell>
          <table:table-cell table:style-name="ce88" office:value-type="float" office:value="0.036" calcext:value-type="float">
            <text:p>0,036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54</text:p>
          </table:table-cell>
          <table:table-cell table:style-name="ce117" office:value-type="string" calcext:value-type="string">
            <text:p>39 4 39,723 W</text:p>
          </table:table-cell>
          <table:table-cell table:style-name="ce88" office:value-type="float" office:value="0.0059" calcext:value-type="float">
            <text:p>0,0059</text:p>
          </table:table-cell>
          <table:table-cell table:style-name="ce117" office:value-type="string" calcext:value-type="string">
            <text:p>11 24 17,121 S</text:p>
          </table:table-cell>
          <table:table-cell table:style-name="ce88" office:value-type="float" office:value="0.0059" calcext:value-type="float">
            <text:p>0,0059</text:p>
          </table:table-cell>
          <table:table-cell table:style-name="ce88" office:value-type="float" office:value="287.89" calcext:value-type="float">
            <text:p>287,89</text:p>
          </table:table-cell>
          <table:table-cell table:style-name="ce88" office:value-type="float" office:value="0.0137" calcext:value-type="float">
            <text:p>0,013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MATR.432/CNS.00.770-8) FAZENDA LAMEIRO\ RUDSON PINTO FERREIRA\ CPF:791.234.14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M-3608</text:p>
          </table:table-cell>
          <table:table-cell table:style-name="ce117" office:value-type="string" calcext:value-type="string">
            <text:p>39 4 39,492 W</text:p>
          </table:table-cell>
          <table:table-cell table:style-name="ce88" office:value-type="float" office:value="0.0064" calcext:value-type="float">
            <text:p>0,0064</text:p>
          </table:table-cell>
          <table:table-cell table:style-name="ce117" office:value-type="string" calcext:value-type="string">
            <text:p>11 24 17,864 S</text:p>
          </table:table-cell>
          <table:table-cell table:style-name="ce88" office:value-type="float" office:value="0.0064" calcext:value-type="float">
            <text:p>0,0064</text:p>
          </table:table-cell>
          <table:table-cell table:style-name="ce88" office:value-type="float" office:value="288.445" calcext:value-type="float">
            <text:p>288,445</text:p>
          </table:table-cell>
          <table:table-cell table:style-name="ce88" office:value-type="float" office:value="0.0133" calcext:value-type="float">
            <text:p>0,013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POSSE) FAZENDA PAU D'ÁGUA\ VALDETE DOS SANTOS\ CPF:161.770.45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55</text:p>
          </table:table-cell>
          <table:table-cell table:style-name="ce117" office:value-type="string" calcext:value-type="string">
            <text:p>39 4 38,951 W</text:p>
          </table:table-cell>
          <table:table-cell table:style-name="ce88" office:value-type="float" office:value="0.0042" calcext:value-type="float">
            <text:p>0,0042</text:p>
          </table:table-cell>
          <table:table-cell table:style-name="ce117" office:value-type="string" calcext:value-type="string">
            <text:p>11 24 19,846 S</text:p>
          </table:table-cell>
          <table:table-cell table:style-name="ce88" office:value-type="float" office:value="0.0042" calcext:value-type="float">
            <text:p>0,0042</text:p>
          </table:table-cell>
          <table:table-cell table:style-name="ce88" office:value-type="float" office:value="294.915" calcext:value-type="float">
            <text:p>294,915</text:p>
          </table:table-cell>
          <table:table-cell table:style-name="ce88" office:value-type="float" office:value="0.0083" calcext:value-type="float">
            <text:p>0,008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POSSE) FAZENDA PAU D'ÁGUA\ VALDETE DOS SANTOS\ CPF:161.770.45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56</text:p>
          </table:table-cell>
          <table:table-cell table:style-name="ce117" office:value-type="string" calcext:value-type="string">
            <text:p>39 4 38,545 W</text:p>
          </table:table-cell>
          <table:table-cell table:style-name="ce88" office:value-type="float" office:value="0.0036" calcext:value-type="float">
            <text:p>0,0036</text:p>
          </table:table-cell>
          <table:table-cell table:style-name="ce117" office:value-type="string" calcext:value-type="string">
            <text:p>11 24 21,326 S</text:p>
          </table:table-cell>
          <table:table-cell table:style-name="ce88" office:value-type="float" office:value="0.0036" calcext:value-type="float">
            <text:p>0,0036</text:p>
          </table:table-cell>
          <table:table-cell table:style-name="ce88" office:value-type="float" office:value="296.771" calcext:value-type="float">
            <text:p>296,771</text:p>
          </table:table-cell>
          <table:table-cell table:style-name="ce88" office:value-type="float" office:value="0.0067" calcext:value-type="float">
            <text:p>0,006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POSSE) FAZENDA PAU D'ÁGUA\ VALDETE DOS SANTOS\ CPF:161.770.45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57</text:p>
          </table:table-cell>
          <table:table-cell table:style-name="ce117" office:value-type="string" calcext:value-type="string">
            <text:p>39 4 38,401 W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117" office:value-type="string" calcext:value-type="string">
            <text:p>11 24 21,854 S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88" office:value-type="float" office:value="294.28" calcext:value-type="float">
            <text:p>294,28</text:p>
          </table:table-cell>
          <table:table-cell table:style-name="ce88" office:value-type="float" office:value="0.0113" calcext:value-type="float">
            <text:p>0,011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POSSE) FAZENDA PAU D'ÁGUA\ VALDETE DOS SANTOS\ CPF:161.770.45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58</text:p>
          </table:table-cell>
          <table:table-cell table:style-name="ce117" office:value-type="string" calcext:value-type="string">
            <text:p>39 4 37,749 W</text:p>
          </table:table-cell>
          <table:table-cell table:style-name="ce88" office:value-type="float" office:value="0.0028" calcext:value-type="float">
            <text:p>0,0028</text:p>
          </table:table-cell>
          <table:table-cell table:style-name="ce117" office:value-type="string" calcext:value-type="string">
            <text:p>11 24 24,096 S</text:p>
          </table:table-cell>
          <table:table-cell table:style-name="ce88" office:value-type="float" office:value="0.0028" calcext:value-type="float">
            <text:p>0,0028</text:p>
          </table:table-cell>
          <table:table-cell table:style-name="ce88" office:value-type="float" office:value="302.996" calcext:value-type="float">
            <text:p>302,996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POSSE) FAZENDA PAU D'ÁGUA\ VALDETE DOS SANTOS\ CPF:161.770.45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59</text:p>
          </table:table-cell>
          <table:table-cell table:style-name="ce117" office:value-type="string" calcext:value-type="string">
            <text:p>39 4 36,908 W</text:p>
          </table:table-cell>
          <table:table-cell table:style-name="ce88" office:value-type="float" office:value="0.0036" calcext:value-type="float">
            <text:p>0,0036</text:p>
          </table:table-cell>
          <table:table-cell table:style-name="ce117" office:value-type="string" calcext:value-type="string">
            <text:p>11 24 26,989 S</text:p>
          </table:table-cell>
          <table:table-cell table:style-name="ce88" office:value-type="float" office:value="0.0036" calcext:value-type="float">
            <text:p>0,0036</text:p>
          </table:table-cell>
          <table:table-cell table:style-name="ce88" office:value-type="float" office:value="303.663" calcext:value-type="float">
            <text:p>303,663</text:p>
          </table:table-cell>
          <table:table-cell table:style-name="ce88" office:value-type="float" office:value="0.0077" calcext:value-type="float">
            <text:p>0,007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1</text:p>
          </table:table-cell>
          <table:table-cell table:style-name="ce121" table:number-columns-repeated="2"/>
          <table:table-cell table:style-name="ce139" office:value-type="string" calcext:value-type="string">
            <text:p>(POSSE) FAZENDA PAU D'ÁGUA\ VALDETE DOS SANTOS\ CPF:161.770.455-53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M-3609</text:p>
          </table:table-cell>
          <table:table-cell table:style-name="ce117" office:value-type="string" calcext:value-type="string">
            <text:p>39 4 36,624 W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117" office:value-type="string" calcext:value-type="string">
            <text:p>11 24 28,014 S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88" office:value-type="float" office:value="299.509" calcext:value-type="float">
            <text:p>299,509</text:p>
          </table:table-cell>
          <table:table-cell table:style-name="ce88" office:value-type="float" office:value="0.012" calcext:value-type="float">
            <text:p>0,012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60</text:p>
          </table:table-cell>
          <table:table-cell table:style-name="ce117" office:value-type="string" calcext:value-type="string">
            <text:p>39 4 37,319 W</text:p>
          </table:table-cell>
          <table:table-cell table:style-name="ce88" office:value-type="float" office:value="0.0038" calcext:value-type="float">
            <text:p>0,0038</text:p>
          </table:table-cell>
          <table:table-cell table:style-name="ce117" office:value-type="string" calcext:value-type="string">
            <text:p>11 24 28,171 S</text:p>
          </table:table-cell>
          <table:table-cell table:style-name="ce88" office:value-type="float" office:value="0.0038" calcext:value-type="float">
            <text:p>0,0038</text:p>
          </table:table-cell>
          <table:table-cell table:style-name="ce88" office:value-type="float" office:value="300.343" calcext:value-type="float">
            <text:p>300,343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61</text:p>
          </table:table-cell>
          <table:table-cell table:style-name="ce117" office:value-type="string" calcext:value-type="string">
            <text:p>39 4 39,900 W</text:p>
          </table:table-cell>
          <table:table-cell table:style-name="ce88" office:value-type="float" office:value="0.0074" calcext:value-type="float">
            <text:p>0,0074</text:p>
          </table:table-cell>
          <table:table-cell table:style-name="ce117" office:value-type="string" calcext:value-type="string">
            <text:p>11 24 28,729 S</text:p>
          </table:table-cell>
          <table:table-cell table:style-name="ce88" office:value-type="float" office:value="0.0074" calcext:value-type="float">
            <text:p>0,0074</text:p>
          </table:table-cell>
          <table:table-cell table:style-name="ce88" office:value-type="float" office:value="303.943" calcext:value-type="float">
            <text:p>303,943</text:p>
          </table:table-cell>
          <table:table-cell table:style-name="ce88" office:value-type="float" office:value="0.0147" calcext:value-type="float">
            <text:p>0,014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62</text:p>
          </table:table-cell>
          <table:table-cell table:style-name="ce117" office:value-type="string" calcext:value-type="string">
            <text:p>39 4 43,600 W</text:p>
          </table:table-cell>
          <table:table-cell table:style-name="ce88" office:value-type="float" office:value="0.009" calcext:value-type="float">
            <text:p>0,009</text:p>
          </table:table-cell>
          <table:table-cell table:style-name="ce117" office:value-type="string" calcext:value-type="string">
            <text:p>11 24 29,586 S</text:p>
          </table:table-cell>
          <table:table-cell table:style-name="ce88" office:value-type="float" office:value="0.009" calcext:value-type="float">
            <text:p>0,009</text:p>
          </table:table-cell>
          <table:table-cell table:style-name="ce88" office:value-type="float" office:value="312.735" calcext:value-type="float">
            <text:p>312,735</text:p>
          </table:table-cell>
          <table:table-cell table:style-name="ce88" office:value-type="float" office:value="0.0157" calcext:value-type="float">
            <text:p>0,015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63</text:p>
          </table:table-cell>
          <table:table-cell table:style-name="ce117" office:value-type="string" calcext:value-type="string">
            <text:p>39 4 44,990 W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117" office:value-type="string" calcext:value-type="string">
            <text:p>11 24 29,906 S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88" office:value-type="float" office:value="313.926" calcext:value-type="float">
            <text:p>313,926</text:p>
          </table:table-cell>
          <table:table-cell table:style-name="ce88" office:value-type="float" office:value="0.0103" calcext:value-type="float">
            <text:p>0,010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V-0758</text:p>
          </table:table-cell>
          <table:table-cell table:style-name="ce117" office:value-type="string" calcext:value-type="string">
            <text:p>39 4 47,198 W</text:p>
          </table:table-cell>
          <table:table-cell table:style-name="ce117" office:value-type="string" calcext:value-type="string">
            <text:p>0,00</text:p>
          </table:table-cell>
          <table:table-cell table:style-name="ce117" office:value-type="string" calcext:value-type="string">
            <text:p>11 24 30,375 S</text:p>
          </table:table-cell>
          <table:table-cell table:style-name="ce117" office:value-type="string" calcext:value-type="string">
            <text:p>0,00</text:p>
          </table:table-cell>
          <table:table-cell table:style-name="ce117" office:value-type="string" calcext:value-type="string">
            <text:p>289,765</text:p>
          </table:table-cell>
          <table:table-cell table:style-name="ce117" office:value-type="string" calcext:value-type="string">
            <text:p>0,02</text:p>
          </table:table-cell>
          <table:table-cell table:style-name="ce127" table:content-validation-name="val3" office:value-type="string" calcext:value-type="string">
            <text:p>PA1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64</text:p>
          </table:table-cell>
          <table:table-cell table:style-name="ce117" office:value-type="string" calcext:value-type="string">
            <text:p>39 4 49,159 W</text:p>
          </table:table-cell>
          <table:table-cell table:style-name="ce88" office:value-type="float" office:value="0.0031" calcext:value-type="float">
            <text:p>0,0031</text:p>
          </table:table-cell>
          <table:table-cell table:style-name="ce117" office:value-type="string" calcext:value-type="string">
            <text:p>11 24 30,813 S</text:p>
          </table:table-cell>
          <table:table-cell table:style-name="ce88" office:value-type="float" office:value="0.0031" calcext:value-type="float">
            <text:p>0,0031</text:p>
          </table:table-cell>
          <table:table-cell table:style-name="ce88" office:value-type="float" office:value="317.334" calcext:value-type="float">
            <text:p>317,334</text:p>
          </table:table-cell>
          <table:table-cell table:style-name="ce88" office:value-type="float" office:value="0.0053" calcext:value-type="float">
            <text:p>0,005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65</text:p>
          </table:table-cell>
          <table:table-cell table:style-name="ce117" office:value-type="string" calcext:value-type="string">
            <text:p>39 4 50,415 W</text:p>
          </table:table-cell>
          <table:table-cell table:style-name="ce88" office:value-type="float" office:value="0.0026" calcext:value-type="float">
            <text:p>0,0026</text:p>
          </table:table-cell>
          <table:table-cell table:style-name="ce117" office:value-type="string" calcext:value-type="string">
            <text:p>11 24 30,946 S</text:p>
          </table:table-cell>
          <table:table-cell table:style-name="ce88" office:value-type="float" office:value="0.0026" calcext:value-type="float">
            <text:p>0,0026</text:p>
          </table:table-cell>
          <table:table-cell table:style-name="ce88" office:value-type="float" office:value="318.435" calcext:value-type="float">
            <text:p>318,435</text:p>
          </table:table-cell>
          <table:table-cell table:style-name="ce88" office:value-type="float" office:value="0.004" calcext:value-type="float">
            <text:p>0,004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66</text:p>
          </table:table-cell>
          <table:table-cell table:style-name="ce117" office:value-type="string" calcext:value-type="string">
            <text:p>39 4 51,721 W</text:p>
          </table:table-cell>
          <table:table-cell table:style-name="ce88" office:value-type="float" office:value="0.0024" calcext:value-type="float">
            <text:p>0,0024</text:p>
          </table:table-cell>
          <table:table-cell table:style-name="ce117" office:value-type="string" calcext:value-type="string">
            <text:p>11 24 31,439 S</text:p>
          </table:table-cell>
          <table:table-cell table:style-name="ce88" office:value-type="float" office:value="0.0024" calcext:value-type="float">
            <text:p>0,0024</text:p>
          </table:table-cell>
          <table:table-cell table:style-name="ce88" office:value-type="float" office:value="319.376" calcext:value-type="float">
            <text:p>319,376</text:p>
          </table:table-cell>
          <table:table-cell table:style-name="ce88" office:value-type="float" office:value="0.0043" calcext:value-type="float">
            <text:p>0,004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67</text:p>
          </table:table-cell>
          <table:table-cell table:style-name="ce117" office:value-type="string" calcext:value-type="string">
            <text:p>39 4 52,906 W</text:p>
          </table:table-cell>
          <table:table-cell table:style-name="ce88" office:value-type="float" office:value="0.0083" calcext:value-type="float">
            <text:p>0,0083</text:p>
          </table:table-cell>
          <table:table-cell table:style-name="ce117" office:value-type="string" calcext:value-type="string">
            <text:p>11 24 31,724 S</text:p>
          </table:table-cell>
          <table:table-cell table:style-name="ce88" office:value-type="float" office:value="0.0083" calcext:value-type="float">
            <text:p>0,0083</text:p>
          </table:table-cell>
          <table:table-cell table:style-name="ce88" office:value-type="float" office:value="319.783" calcext:value-type="float">
            <text:p>319,783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68</text:p>
          </table:table-cell>
          <table:table-cell table:style-name="ce117" office:value-type="string" calcext:value-type="string">
            <text:p>39 4 55,142 W</text:p>
          </table:table-cell>
          <table:table-cell table:style-name="ce88" office:value-type="float" office:value="0.018" calcext:value-type="float">
            <text:p>0,018</text:p>
          </table:table-cell>
          <table:table-cell table:style-name="ce117" office:value-type="string" calcext:value-type="string">
            <text:p>11 24 32,246 S</text:p>
          </table:table-cell>
          <table:table-cell table:style-name="ce88" office:value-type="float" office:value="0.018" calcext:value-type="float">
            <text:p>0,018</text:p>
          </table:table-cell>
          <table:table-cell table:style-name="ce88" office:value-type="float" office:value="319.622" calcext:value-type="float">
            <text:p>319,622</text:p>
          </table:table-cell>
          <table:table-cell table:style-name="ce88" office:value-type="float" office:value="0.026" calcext:value-type="float">
            <text:p>0,026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69</text:p>
          </table:table-cell>
          <table:table-cell table:style-name="ce117" office:value-type="string" calcext:value-type="string">
            <text:p>39 4 55,816 W</text:p>
          </table:table-cell>
          <table:table-cell table:style-name="ce88" office:value-type="float" office:value="0.0137" calcext:value-type="float">
            <text:p>0,0137</text:p>
          </table:table-cell>
          <table:table-cell table:style-name="ce117" office:value-type="string" calcext:value-type="string">
            <text:p>11 24 32,402 S</text:p>
          </table:table-cell>
          <table:table-cell table:style-name="ce88" office:value-type="float" office:value="0.0137" calcext:value-type="float">
            <text:p>0,0137</text:p>
          </table:table-cell>
          <table:table-cell table:style-name="ce88" office:value-type="float" office:value="319.359" calcext:value-type="float">
            <text:p>319,359</text:p>
          </table:table-cell>
          <table:table-cell table:style-name="ce88" office:value-type="float" office:value="0.0237" calcext:value-type="float">
            <text:p>0,023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70</text:p>
          </table:table-cell>
          <table:table-cell table:style-name="ce117" office:value-type="string" calcext:value-type="string">
            <text:p>39 4 57,398 W</text:p>
          </table:table-cell>
          <table:table-cell table:style-name="ce88" office:value-type="float" office:value="0.0138" calcext:value-type="float">
            <text:p>0,0138</text:p>
          </table:table-cell>
          <table:table-cell table:style-name="ce117" office:value-type="string" calcext:value-type="string">
            <text:p>11 24 32,533 S</text:p>
          </table:table-cell>
          <table:table-cell table:style-name="ce88" office:value-type="float" office:value="0.0138" calcext:value-type="float">
            <text:p>0,0138</text:p>
          </table:table-cell>
          <table:table-cell table:style-name="ce88" office:value-type="float" office:value="319.763" calcext:value-type="float">
            <text:p>319,763</text:p>
          </table:table-cell>
          <table:table-cell table:style-name="ce88" office:value-type="float" office:value="0.0233" calcext:value-type="float">
            <text:p>0,023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71</text:p>
          </table:table-cell>
          <table:table-cell table:style-name="ce117" office:value-type="string" calcext:value-type="string">
            <text:p>39 4 59,427 W</text:p>
          </table:table-cell>
          <table:table-cell table:style-name="ce88" office:value-type="float" office:value="0.0107" calcext:value-type="float">
            <text:p>0,0107</text:p>
          </table:table-cell>
          <table:table-cell table:style-name="ce117" office:value-type="string" calcext:value-type="string">
            <text:p>11 24 33,252 S</text:p>
          </table:table-cell>
          <table:table-cell table:style-name="ce88" office:value-type="float" office:value="0.0107" calcext:value-type="float">
            <text:p>0,0107</text:p>
          </table:table-cell>
          <table:table-cell table:style-name="ce88" office:value-type="float" office:value="321.327" calcext:value-type="float">
            <text:p>321,327</text:p>
          </table:table-cell>
          <table:table-cell table:style-name="ce88" office:value-type="float" office:value="0.0193" calcext:value-type="float">
            <text:p>0,019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72</text:p>
          </table:table-cell>
          <table:table-cell table:style-name="ce117" office:value-type="string" calcext:value-type="string">
            <text:p>39 5 02,167 W</text:p>
          </table:table-cell>
          <table:table-cell table:style-name="ce88" office:value-type="float" office:value="0.0177" calcext:value-type="float">
            <text:p>0,0177</text:p>
          </table:table-cell>
          <table:table-cell table:style-name="ce117" office:value-type="string" calcext:value-type="string">
            <text:p>11 24 33,880 S</text:p>
          </table:table-cell>
          <table:table-cell table:style-name="ce88" office:value-type="float" office:value="0.0177" calcext:value-type="float">
            <text:p>0,0177</text:p>
          </table:table-cell>
          <table:table-cell table:style-name="ce88" office:value-type="float" office:value="324.338" calcext:value-type="float">
            <text:p>324,338</text:p>
          </table:table-cell>
          <table:table-cell table:style-name="ce88" office:value-type="float" office:value="0.0243" calcext:value-type="float">
            <text:p>0,024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BA 408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M-3610</text:p>
          </table:table-cell>
          <table:table-cell table:style-name="ce117" office:value-type="string" calcext:value-type="string">
            <text:p>39 5 04,775 W</text:p>
          </table:table-cell>
          <table:table-cell table:style-name="ce88" office:value-type="float" office:value="0.0152" calcext:value-type="float">
            <text:p>0,0152</text:p>
          </table:table-cell>
          <table:table-cell table:style-name="ce117" office:value-type="string" calcext:value-type="string">
            <text:p>11 24 34,461 S</text:p>
          </table:table-cell>
          <table:table-cell table:style-name="ce88" office:value-type="float" office:value="0.0152" calcext:value-type="float">
            <text:p>0,0152</text:p>
          </table:table-cell>
          <table:table-cell table:style-name="ce88" office:value-type="float" office:value="327.625" calcext:value-type="float">
            <text:p>327,625</text:p>
          </table:table-cell>
          <table:table-cell table:style-name="ce88" office:value-type="float" office:value="0.0273" calcext:value-type="float">
            <text:p>0,027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73</text:p>
          </table:table-cell>
          <table:table-cell table:style-name="ce117" office:value-type="string" calcext:value-type="string">
            <text:p>39 5 04,540 W</text:p>
          </table:table-cell>
          <table:table-cell table:style-name="ce88" office:value-type="float" office:value="0.0059" calcext:value-type="float">
            <text:p>0,0059</text:p>
          </table:table-cell>
          <table:table-cell table:style-name="ce117" office:value-type="string" calcext:value-type="string">
            <text:p>11 24 31,234 S</text:p>
          </table:table-cell>
          <table:table-cell table:style-name="ce88" office:value-type="float" office:value="0.0059" calcext:value-type="float">
            <text:p>0,0059</text:p>
          </table:table-cell>
          <table:table-cell table:style-name="ce88" office:value-type="float" office:value="323.802" calcext:value-type="float">
            <text:p>323,802</text:p>
          </table:table-cell>
          <table:table-cell table:style-name="ce88" office:value-type="float" office:value="0.0092" calcext:value-type="float">
            <text:p>0,0092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74</text:p>
          </table:table-cell>
          <table:table-cell table:style-name="ce117" office:value-type="string" calcext:value-type="string">
            <text:p>39 5 04,384 W</text:p>
          </table:table-cell>
          <table:table-cell table:style-name="ce88" office:value-type="float" office:value="0.0052" calcext:value-type="float">
            <text:p>0,0052</text:p>
          </table:table-cell>
          <table:table-cell table:style-name="ce117" office:value-type="string" calcext:value-type="string">
            <text:p>11 24 28,942 S</text:p>
          </table:table-cell>
          <table:table-cell table:style-name="ce88" office:value-type="float" office:value="0.0052" calcext:value-type="float">
            <text:p>0,0052</text:p>
          </table:table-cell>
          <table:table-cell table:style-name="ce88" office:value-type="float" office:value="323.04" calcext:value-type="float">
            <text:p>323,04</text:p>
          </table:table-cell>
          <table:table-cell table:style-name="ce88" office:value-type="float" office:value="0.0083" calcext:value-type="float">
            <text:p>0,008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75</text:p>
          </table:table-cell>
          <table:table-cell table:style-name="ce117" office:value-type="string" calcext:value-type="string">
            <text:p>39 5 04,243 W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117" office:value-type="string" calcext:value-type="string">
            <text:p>11 24 26,765 S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88" office:value-type="float" office:value="320.067" calcext:value-type="float">
            <text:p>320,067</text:p>
          </table:table-cell>
          <table:table-cell table:style-name="ce88" office:value-type="float" office:value="0.0089" calcext:value-type="float">
            <text:p>0,0089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76</text:p>
          </table:table-cell>
          <table:table-cell table:style-name="ce117" office:value-type="string" calcext:value-type="string">
            <text:p>39 5 04,085 W</text:p>
          </table:table-cell>
          <table:table-cell table:style-name="ce88" office:value-type="float" office:value="0.0074" calcext:value-type="float">
            <text:p>0,0074</text:p>
          </table:table-cell>
          <table:table-cell table:style-name="ce117" office:value-type="string" calcext:value-type="string">
            <text:p>11 24 24,484 S</text:p>
          </table:table-cell>
          <table:table-cell table:style-name="ce88" office:value-type="float" office:value="0.0074" calcext:value-type="float">
            <text:p>0,0074</text:p>
          </table:table-cell>
          <table:table-cell table:style-name="ce88" office:value-type="float" office:value="311.519" calcext:value-type="float">
            <text:p>311,519</text:p>
          </table:table-cell>
          <table:table-cell table:style-name="ce88" office:value-type="float" office:value="0.0133" calcext:value-type="float">
            <text:p>0,013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77</text:p>
          </table:table-cell>
          <table:table-cell table:style-name="ce117" office:value-type="string" calcext:value-type="string">
            <text:p>39 5 03,943 W</text:p>
          </table:table-cell>
          <table:table-cell table:style-name="ce88" office:value-type="float" office:value="0.0083" calcext:value-type="float">
            <text:p>0,0083</text:p>
          </table:table-cell>
          <table:table-cell table:style-name="ce117" office:value-type="string" calcext:value-type="string">
            <text:p>11 24 21,798 S</text:p>
          </table:table-cell>
          <table:table-cell table:style-name="ce88" office:value-type="float" office:value="0.0083" calcext:value-type="float">
            <text:p>0,0083</text:p>
          </table:table-cell>
          <table:table-cell table:style-name="ce88" office:value-type="float" office:value="315.425" calcext:value-type="float">
            <text:p>315,425</text:p>
          </table:table-cell>
          <table:table-cell table:style-name="ce88" office:value-type="float" office:value="0.012" calcext:value-type="float">
            <text:p>0,012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78</text:p>
          </table:table-cell>
          <table:table-cell table:style-name="ce117" office:value-type="string" calcext:value-type="string">
            <text:p>39 5 03,822 W</text:p>
          </table:table-cell>
          <table:table-cell table:style-name="ce88" office:value-type="float" office:value="0.0071" calcext:value-type="float">
            <text:p>0,0071</text:p>
          </table:table-cell>
          <table:table-cell table:style-name="ce117" office:value-type="string" calcext:value-type="string">
            <text:p>11 24 18,094 S</text:p>
          </table:table-cell>
          <table:table-cell table:style-name="ce88" office:value-type="float" office:value="0.0071" calcext:value-type="float">
            <text:p>0,0071</text:p>
          </table:table-cell>
          <table:table-cell table:style-name="ce88" office:value-type="float" office:value="312.283" calcext:value-type="float">
            <text:p>312,283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79</text:p>
          </table:table-cell>
          <table:table-cell table:style-name="ce117" office:value-type="string" calcext:value-type="string">
            <text:p>39 5 04,028 W</text:p>
          </table:table-cell>
          <table:table-cell table:style-name="ce88" office:value-type="float" office:value="0.0102" calcext:value-type="float">
            <text:p>0,0102</text:p>
          </table:table-cell>
          <table:table-cell table:style-name="ce117" office:value-type="string" calcext:value-type="string">
            <text:p>11 24 16,003 S</text:p>
          </table:table-cell>
          <table:table-cell table:style-name="ce88" office:value-type="float" office:value="0.0102" calcext:value-type="float">
            <text:p>0,0102</text:p>
          </table:table-cell>
          <table:table-cell table:style-name="ce88" office:value-type="float" office:value="306.182" calcext:value-type="float">
            <text:p>306,182</text:p>
          </table:table-cell>
          <table:table-cell table:style-name="ce88" office:value-type="float" office:value="0.017" calcext:value-type="float">
            <text:p>0,01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80</text:p>
          </table:table-cell>
          <table:table-cell table:style-name="ce117" office:value-type="string" calcext:value-type="string">
            <text:p>39 5 04,339 W</text:p>
          </table:table-cell>
          <table:table-cell table:style-name="ce88" office:value-type="float" office:value="0.0073" calcext:value-type="float">
            <text:p>0,0073</text:p>
          </table:table-cell>
          <table:table-cell table:style-name="ce117" office:value-type="string" calcext:value-type="string">
            <text:p>11 24 12,982 S</text:p>
          </table:table-cell>
          <table:table-cell table:style-name="ce88" office:value-type="float" office:value="0.0073" calcext:value-type="float">
            <text:p>0,0073</text:p>
          </table:table-cell>
          <table:table-cell table:style-name="ce88" office:value-type="float" office:value="299.749" calcext:value-type="float">
            <text:p>299,749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81</text:p>
          </table:table-cell>
          <table:table-cell table:style-name="ce117" office:value-type="string" calcext:value-type="string">
            <text:p>39 5 04,465 W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117" office:value-type="string" calcext:value-type="string">
            <text:p>11 24 11,707 S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88" office:value-type="float" office:value="298.581" calcext:value-type="float">
            <text:p>298,581</text:p>
          </table:table-cell>
          <table:table-cell table:style-name="ce88" office:value-type="float" office:value="0.0133" calcext:value-type="float">
            <text:p>0,013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82</text:p>
          </table:table-cell>
          <table:table-cell table:style-name="ce117" office:value-type="string" calcext:value-type="string">
            <text:p>39 5 05,021 W</text:p>
          </table:table-cell>
          <table:table-cell table:style-name="ce88" office:value-type="float" office:value="0.0195" calcext:value-type="float">
            <text:p>0,0195</text:p>
          </table:table-cell>
          <table:table-cell table:style-name="ce117" office:value-type="string" calcext:value-type="string">
            <text:p>11 24 05,798 S</text:p>
          </table:table-cell>
          <table:table-cell table:style-name="ce88" office:value-type="float" office:value="0.0195" calcext:value-type="float">
            <text:p>0,0195</text:p>
          </table:table-cell>
          <table:table-cell table:style-name="ce88" office:value-type="float" office:value="304.706" calcext:value-type="float">
            <text:p>304,706</text:p>
          </table:table-cell>
          <table:table-cell table:style-name="ce88" office:value-type="float" office:value="0.0343" calcext:value-type="float">
            <text:p>0,034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83</text:p>
          </table:table-cell>
          <table:table-cell table:style-name="ce117" office:value-type="string" calcext:value-type="string">
            <text:p>39 5 05,274 W</text:p>
          </table:table-cell>
          <table:table-cell table:style-name="ce88" office:value-type="float" office:value="0.0062" calcext:value-type="float">
            <text:p>0,0062</text:p>
          </table:table-cell>
          <table:table-cell table:style-name="ce117" office:value-type="string" calcext:value-type="string">
            <text:p>11 24 03,369 S</text:p>
          </table:table-cell>
          <table:table-cell table:style-name="ce88" office:value-type="float" office:value="0.0062" calcext:value-type="float">
            <text:p>0,0062</text:p>
          </table:table-cell>
          <table:table-cell table:style-name="ce88" office:value-type="float" office:value="303.652" calcext:value-type="float">
            <text:p>303,652</text:p>
          </table:table-cell>
          <table:table-cell table:style-name="ce88" office:value-type="float" office:value="0.0092" calcext:value-type="float">
            <text:p>0,0092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84</text:p>
          </table:table-cell>
          <table:table-cell table:style-name="ce117" office:value-type="string" calcext:value-type="string">
            <text:p>39 5 05,413 W</text:p>
          </table:table-cell>
          <table:table-cell table:style-name="ce88" office:value-type="float" office:value="0.0028" calcext:value-type="float">
            <text:p>0,0028</text:p>
          </table:table-cell>
          <table:table-cell table:style-name="ce117" office:value-type="string" calcext:value-type="string">
            <text:p>11 24 02,037 S</text:p>
          </table:table-cell>
          <table:table-cell table:style-name="ce88" office:value-type="float" office:value="0.0028" calcext:value-type="float">
            <text:p>0,0028</text:p>
          </table:table-cell>
          <table:table-cell table:style-name="ce88" office:value-type="float" office:value="304.605" calcext:value-type="float">
            <text:p>304,605</text:p>
          </table:table-cell>
          <table:table-cell table:style-name="ce88" office:value-type="float" office:value="0.006" calcext:value-type="float">
            <text:p>0,006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85</text:p>
          </table:table-cell>
          <table:table-cell table:style-name="ce117" office:value-type="string" calcext:value-type="string">
            <text:p>39 5 05,961 W</text:p>
          </table:table-cell>
          <table:table-cell table:style-name="ce88" office:value-type="float" office:value="0.0066" calcext:value-type="float">
            <text:p>0,0066</text:p>
          </table:table-cell>
          <table:table-cell table:style-name="ce117" office:value-type="string" calcext:value-type="string">
            <text:p>11 23 56,996 S</text:p>
          </table:table-cell>
          <table:table-cell table:style-name="ce88" office:value-type="float" office:value="0.0066" calcext:value-type="float">
            <text:p>0,0066</text:p>
          </table:table-cell>
          <table:table-cell table:style-name="ce88" office:value-type="float" office:value="307.005" calcext:value-type="float">
            <text:p>307,005</text:p>
          </table:table-cell>
          <table:table-cell table:style-name="ce88" office:value-type="float" office:value="0.0107" calcext:value-type="float">
            <text:p>0,010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86</text:p>
          </table:table-cell>
          <table:table-cell table:style-name="ce117" office:value-type="string" calcext:value-type="string">
            <text:p>39 5 06,311 W</text:p>
          </table:table-cell>
          <table:table-cell table:style-name="ce88" office:value-type="float" office:value="0.0059" calcext:value-type="float">
            <text:p>0,0059</text:p>
          </table:table-cell>
          <table:table-cell table:style-name="ce117" office:value-type="string" calcext:value-type="string">
            <text:p>11 23 53,515 S</text:p>
          </table:table-cell>
          <table:table-cell table:style-name="ce88" office:value-type="float" office:value="0.0059" calcext:value-type="float">
            <text:p>0,0059</text:p>
          </table:table-cell>
          <table:table-cell table:style-name="ce88" office:value-type="float" office:value="307.289" calcext:value-type="float">
            <text:p>307,289</text:p>
          </table:table-cell>
          <table:table-cell table:style-name="ce88" office:value-type="float" office:value="0.0093" calcext:value-type="float">
            <text:p>0,009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87</text:p>
          </table:table-cell>
          <table:table-cell table:style-name="ce117" office:value-type="string" calcext:value-type="string">
            <text:p>39 5 06,526 W</text:p>
          </table:table-cell>
          <table:table-cell table:style-name="ce88" office:value-type="float" office:value="0.0097" calcext:value-type="float">
            <text:p>0,0097</text:p>
          </table:table-cell>
          <table:table-cell table:style-name="ce117" office:value-type="string" calcext:value-type="string">
            <text:p>11 23 51,422 S</text:p>
          </table:table-cell>
          <table:table-cell table:style-name="ce88" office:value-type="float" office:value="0.0097" calcext:value-type="float">
            <text:p>0,0097</text:p>
          </table:table-cell>
          <table:table-cell table:style-name="ce88" office:value-type="float" office:value="305.085" calcext:value-type="float">
            <text:p>305,085</text:p>
          </table:table-cell>
          <table:table-cell table:style-name="ce88" office:value-type="float" office:value="0.0183" calcext:value-type="float">
            <text:p>0,0183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88</text:p>
          </table:table-cell>
          <table:table-cell table:style-name="ce117" office:value-type="string" calcext:value-type="string">
            <text:p>39 5 06,694 W</text:p>
          </table:table-cell>
          <table:table-cell table:style-name="ce88" office:value-type="float" office:value="0.0073" calcext:value-type="float">
            <text:p>0,0073</text:p>
          </table:table-cell>
          <table:table-cell table:style-name="ce117" office:value-type="string" calcext:value-type="string">
            <text:p>11 23 49,508 S</text:p>
          </table:table-cell>
          <table:table-cell table:style-name="ce88" office:value-type="float" office:value="0.0073" calcext:value-type="float">
            <text:p>0,0073</text:p>
          </table:table-cell>
          <table:table-cell table:style-name="ce88" office:value-type="float" office:value="303.507" calcext:value-type="float">
            <text:p>303,507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89</text:p>
          </table:table-cell>
          <table:table-cell table:style-name="ce117" office:value-type="string" calcext:value-type="string">
            <text:p>39 5 06,665 W</text:p>
          </table:table-cell>
          <table:table-cell table:style-name="ce88" office:value-type="float" office:value="0.0042" calcext:value-type="float">
            <text:p>0,0042</text:p>
          </table:table-cell>
          <table:table-cell table:style-name="ce117" office:value-type="string" calcext:value-type="string">
            <text:p>11 23 49,335 S</text:p>
          </table:table-cell>
          <table:table-cell table:style-name="ce88" office:value-type="float" office:value="0.0042" calcext:value-type="float">
            <text:p>0,0042</text:p>
          </table:table-cell>
          <table:table-cell table:style-name="ce88" office:value-type="float" office:value="303.445" calcext:value-type="float">
            <text:p>303,445</text:p>
          </table:table-cell>
          <table:table-cell table:style-name="ce88" office:value-type="float" office:value="0.0084" calcext:value-type="float">
            <text:p>0,0084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90</text:p>
          </table:table-cell>
          <table:table-cell table:style-name="ce117" office:value-type="string" calcext:value-type="string">
            <text:p>39 5 06,466 W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117" office:value-type="string" calcext:value-type="string">
            <text:p>11 23 48,614 S</text:p>
          </table:table-cell>
          <table:table-cell table:style-name="ce88" office:value-type="float" office:value="0.0057" calcext:value-type="float">
            <text:p>0,0057</text:p>
          </table:table-cell>
          <table:table-cell table:style-name="ce88" office:value-type="float" office:value="303.031" calcext:value-type="float">
            <text:p>303,031</text:p>
          </table:table-cell>
          <table:table-cell table:style-name="ce88" office:value-type="float" office:value="0.0117" calcext:value-type="float">
            <text:p>0,011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91</text:p>
          </table:table-cell>
          <table:table-cell table:style-name="ce117" office:value-type="string" calcext:value-type="string">
            <text:p>39 5 05,972 W</text:p>
          </table:table-cell>
          <table:table-cell table:style-name="ce88" office:value-type="float" office:value="0.0071" calcext:value-type="float">
            <text:p>0,0071</text:p>
          </table:table-cell>
          <table:table-cell table:style-name="ce117" office:value-type="string" calcext:value-type="string">
            <text:p>11 23 47,011 S</text:p>
          </table:table-cell>
          <table:table-cell table:style-name="ce88" office:value-type="float" office:value="0.0071" calcext:value-type="float">
            <text:p>0,0071</text:p>
          </table:table-cell>
          <table:table-cell table:style-name="ce88" office:value-type="float" office:value="302.864" calcext:value-type="float">
            <text:p>302,864</text:p>
          </table:table-cell>
          <table:table-cell table:style-name="ce88" office:value-type="float" office:value="0.0147" calcext:value-type="float">
            <text:p>0,0147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 office:value-type="string" calcext:value-type="string">
            <text:p>DSBN-P-13192</text:p>
          </table:table-cell>
          <table:table-cell table:style-name="ce117" office:value-type="string" calcext:value-type="string">
            <text:p>39 5 05,259 W</text:p>
          </table:table-cell>
          <table:table-cell table:style-name="ce88" office:value-type="float" office:value="0.0062" calcext:value-type="float">
            <text:p>0,0062</text:p>
          </table:table-cell>
          <table:table-cell table:style-name="ce117" office:value-type="string" calcext:value-type="string">
            <text:p>11 23 45,300 S</text:p>
          </table:table-cell>
          <table:table-cell table:style-name="ce88" office:value-type="float" office:value="0.0062" calcext:value-type="float">
            <text:p>0,0062</text:p>
          </table:table-cell>
          <table:table-cell table:style-name="ce88" office:value-type="float" office:value="302.591" calcext:value-type="float">
            <text:p>302,591</text:p>
          </table:table-cell>
          <table:table-cell table:style-name="ce88" office:value-type="float" office:value="0.012" calcext:value-type="float">
            <text:p>0,012</text:p>
          </table:table-cell>
          <table:table-cell table:style-name="ce127" table:content-validation-name="val3" office:value-type="string" calcext:value-type="string">
            <text:p>PG6</text:p>
          </table:table-cell>
          <table:table-cell table:style-name="ce121" table:content-validation-name="val5" office:value-type="string" calcext:value-type="string">
            <text:p>LA3</text:p>
          </table:table-cell>
          <table:table-cell table:style-name="ce121" table:number-columns-repeated="2"/>
          <table:table-cell table:style-name="ce139" office:value-type="string" calcext:value-type="string">
            <text:p>CORREDOR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106"/>
          <table:table-cell table:style-name="ce117"/>
          <table:table-cell table:style-name="ce88"/>
          <table:table-cell table:style-name="ce117"/>
          <table:table-cell table:style-name="ce88" table:number-columns-repeated="3"/>
          <table:table-cell table:style-name="ce127" table:content-validation-name="val3"/>
          <table:table-cell table:style-name="ce121" table:content-validation-name="val5"/>
          <table:table-cell table:style-name="ce121" table:number-columns-repeated="2"/>
          <table:table-cell table:style-name="ce139"/>
          <table:table-cell table:style-name="ce26" table:number-columns-repeated="1011"/>
          <table:table-cell/>
        </table:table-row>
        <table:table-row table:style-name="ro2" table:number-rows-repeated="118">
          <table:table-cell table:style-name="ce40"/>
          <table:table-cell table:style-name="ce47" table:number-columns-repeated="6"/>
          <table:table-cell table:style-name="ce125" table:content-validation-name="val3"/>
          <table:table-cell table:style-name="ce122" table:content-validation-name="val5"/>
          <table:table-cell table:style-name="ce122" table:number-columns-repeated="2"/>
          <table:table-cell table:style-name="ce29"/>
          <table:table-cell table:style-name="ce26" table:number-columns-repeated="1011"/>
          <table:table-cell/>
        </table:table-row>
        <table:table-row table:style-name="ro8" table:number-rows-repeated="13">
          <table:table-cell table:style-name="ce104" table:number-columns-repeated="12"/>
          <table:table-cell table:style-name="ce26" table:number-columns-repeated="1011"/>
          <table:table-cell/>
        </table:table-row>
        <table:table-row table:style-name="ro6" table:number-rows-repeated="65265">
          <table:table-cell table:style-name="ce41"/>
          <table:table-cell table:style-name="ce49" table:number-columns-repeated="6"/>
          <table:table-cell table:style-name="ce116"/>
          <table:table-cell table:style-name="ce116" table:content-validation-name="val4"/>
          <table:table-cell table:style-name="ce116" table:number-columns-repeated="2"/>
          <table:table-cell table:style-name="ce81"/>
          <table:table-cell table:style-name="ce26" table:number-columns-repeated="1011"/>
          <table:table-cell/>
        </table:table-row>
        <table:table-row table:style-name="ro6" table:number-rows-repeated="983097">
          <table:table-cell table:number-columns-repeated="8"/>
          <table:table-cell table:content-validation-name="val4"/>
          <table:table-cell table:number-columns-repeated="1015"/>
        </table:table-row>
        <table:table-row table:style-name="ro6">
          <table:table-cell table:number-columns-repeated="8"/>
          <table:table-cell table:content-validation-name="val4"/>
          <table:table-cell table:number-columns-repeated="1015"/>
        </table:table-row>
      </table:table>
      <table:table table:name="sobre" table:style-name="ta3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4" form:id="control14" form:label="SIGEF" form:button-type="url" office:target-frame="" xlink:href="https://sigef.incra.gov.br/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4" svg:width="1.366cm" svg:height="0.333cm" svg:x="4.664cm" svg:y="2.221cm" draw:control="control14"/>
        </table:shapes>
        <table:table-column table:style-name="co53" table:default-cell-style-name="Default"/>
        <table:table-column table:style-name="co13" table:visibility="collapse" table:number-columns-repeated="1023" table:default-cell-style-name="Default"/>
        <table:table-row table:style-name="ro11">
          <table:table-cell table:style-name="ce82" office:value-type="string" calcext:value-type="string">
            <text:p>Planilha Eletrônica de Dados Georreferenciados</text:p>
          </table:table-cell>
          <table:table-cell table:number-columns-repeated="1023"/>
        </table:table-row>
        <table:table-row table:style-name="ro12">
          <table:table-cell table:style-name="ce83" office:value-type="string" calcext:value-type="string">
            <text:p>A planilha eletrônica de dados georreferenciados foi desenvolvida para uso no Sistema de Gestão Fundiária (SIGEF). Representa o produto do serviço executado pelo Responsável Técnico. O profissional deve atentar cuidadosamente aos detalhes de seu preenchimento de modo a garantir que seja fidedigno ao trabalho executado.</text:p>
          </table:table-cell>
          <table:table-cell table:number-columns-repeated="1023"/>
        </table:table-row>
        <table:table-row table:style-name="ro8">
          <table:table-cell table:style-name="ce83" office:value-type="string" calcext:value-type="string">
            <text:p>Para maiores informações, consulte:</text:p>
          </table:table-cell>
          <table:table-cell table:number-columns-repeated="1023"/>
        </table:table-row>
        <table:table-row table:style-name="ro8" table:visibility="collapse" table:number-rows-repeated="1048572">
          <table:table-cell table:number-columns-repeated="1024"/>
        </table:table-row>
        <table:table-row table:style-name="ro8" table:visibility="collapse">
          <table:table-cell table:number-columns-repeated="1024"/>
        </table:table-row>
      </table:table>
      <table:table table:name="parametros_controles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table:style-name="ce134" office:value-type="string" calcext:value-type="string">
            <text:p>Identificação</text:p>
          </table:table-cell>
          <table:table-cell/>
          <table:table-cell office:value-type="string" calcext:value-type="string">
            <text:p>* Lista para popular os controles</text:p>
          </table:table-cell>
        </table:table-row>
        <table:table-row table:style-name="ro2">
          <table:table-cell table:style-name="ce135" office:value-type="string" calcext:value-type="string">
            <text:p>Natureza:</text:p>
          </table:table-cell>
          <table:table-cell office:value-type="string" calcext:value-type="string">
            <text:p>Contrato com Administração Pública</text:p>
          </table:table-cell>
          <table:table-cell office:value-type="string" calcext:value-type="string">
            <text:p>** Ao alterar os itens REMAPEAR “Intervalo de células de origem” do controle correspondente</text:p>
          </table:table-cell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5" office:value-type="string" calcext:value-type="string">
            <text:p>Situação:</text:p>
          </table:table-cell>
          <table:table-cell office:value-type="string" calcext:value-type="string">
            <text:p>Imóvel Registr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Titulada não Regi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não Titulada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5" office:value-type="string" calcext:value-type="string">
            <text:p>Natureza da área:</text:p>
          </table:table-cell>
          <table:table-cell office:value-type="string" calcext:value-type="string">
            <text:p>Assentamen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ntamento Parce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v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6" office:value-type="string" calcext:value-type="string">
            <text:p>Município(s):</text:p>
          </table:table-cell>
          <table:table-cell office:value-type="string" calcext:value-type="string">
            <text:p>Abad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a dos Dou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e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ti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don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 Figueired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ardo Lu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 Ca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 e Li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ia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a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ju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uã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eg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p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ri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ama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olf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r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u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gados da 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Bez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láud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u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rân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est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i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nômic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Azul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la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omp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Limp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Pre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San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ni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B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a Pra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anta Bárb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ormos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r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Lind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Morn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Verme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ia Bran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ru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ur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Nov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mb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ber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anti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inó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oba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deias Alt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cr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ém 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nquer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and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e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Chav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Marcon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Wagn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godão de Jand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hand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ir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n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no Afon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o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rc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st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i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n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er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Pindar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s 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el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oa Vi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do Rodrigu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Horizo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Long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gua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n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iqui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Nov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Taquar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ô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umí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ã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e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Florenc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Mach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o de Carv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e Minas-MG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lvorada do Gurguéi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lvorada do Nort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lvorada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lvorad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lvorad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ajari-R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mambai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apá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apá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aporã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araji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aral Ferrador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aralin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arante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arante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argos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aturá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élia Rodrigu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érica Dourad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erica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ericano do Brasil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érico Brasiliens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érico de Camp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etist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ontad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ori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paro de São Francisc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paro do Ser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par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pa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mpér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di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g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hy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já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jatub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lând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mã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ná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nindeu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á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pu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puru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stáci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aurilândi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chiet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chie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daraí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dir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dorinh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drad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drad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dré da Roc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dre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gatu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ge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gélic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gelim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gelin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gical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gica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gic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gico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gra dos Rei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gue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Ângul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hanguer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hemb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hum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icun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ísio de Abreu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ita Garibaldi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itápoli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ori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a Gord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onina do Nort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oni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ônio Almeid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ônio Cardos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ônio Carl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ônio Carl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ônio Di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ônio Gonçalv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ônio Joã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ônio Martin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ônio Olint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ônio Prado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ônio Pra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arecida d'Oes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arecida de Goiân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arecida do Rio Doc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arecida do Rio Negr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arecida do Taboad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arecid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arecid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eribé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iacá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iacá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i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icum-Açu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iún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odi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or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oré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uarem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ucara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uí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puiaré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quidabã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quidauan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quiraz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butã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çagi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ç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caju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çarigua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ç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cati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cat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çatu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c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cita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çoiaba da Ser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coiab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çoiab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cruz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çu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çu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arça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oiân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omina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uacem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uaçu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uaian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uaín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uainh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uanã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uanã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uapaz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uar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gua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iose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l Moreir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mar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mbaré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m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m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nd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nti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pe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pirac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poem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po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pong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porã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pot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pu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puã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putang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quari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anguá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aqua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endá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i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ic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ip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ipin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uam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un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ru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tac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tib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tub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tuíp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uá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ucár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új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ax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ceburg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co-Ír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c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coverd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a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al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al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ia Branc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ia Branc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ia de Baraún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i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ial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i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i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nápoli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e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ê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giri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icandu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in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ipuanã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iquemes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iranha do Iv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iranh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mação dos Búzio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mazém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neiroz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oazes-PI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roeiras do Itaim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oeir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raial do Cab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raial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raia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roio do Mei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roio do Padr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roio do Sa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roio do Tigr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roio dos Rat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roio Grand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roio Trin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tur Noguei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uanã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uj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vored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rvorezin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scur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spási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ss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ssaré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ssis Brasil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ssis Chateaubriand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ss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ssunçã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ssunçã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stolfo Dut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storg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talaia do Norte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talai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tala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talanta-SC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talé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tibai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tilio Vivacqu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gustinópoli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gusto Corrê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gusto de Li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gusto Pestan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gusto Sever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Áure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relino Lea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rifla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ri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rora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rora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ror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ro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utazes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v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vanhanda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varé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veir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velino Lop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veli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xixá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xixá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baçulând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cabal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cabeir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curi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curitub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dy Bassitt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epend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gé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gre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ía da Traiçã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ía Formos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ianópoli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iã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ixa Grande do Ribeir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ixa Grand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ixi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ixo Guandu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bin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d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iz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neário Arroio do Silv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neário Barra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neário Camboriú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neário Gaivo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neário Piçarra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neário Pinha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neário Rincã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sa Nov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álsam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ls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mbu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abuiú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an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aneir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deira do Su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d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deiran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deirantes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deirantes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deirante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nach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zaê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ão de Anton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ão de Coca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ão de Cotegip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ão de Grajaú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ão de Melgaç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ão de Monte Al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ão do Triunf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aún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aún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bace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balh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bosa Ferraz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bos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caren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celon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celos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ir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Boni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Bonit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Barra D'Alcântar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a Estiv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e Guabirab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e Santa Ros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e Santan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e Santo Antôni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e São Francisc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e São Miguel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e São Miguel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Bugre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Chapé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Choç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Cord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Garça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Guarit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Jacaré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Mend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Our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Piraí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Quara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Ribei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Rio Az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Roch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 Turv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dos Coqueiro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Fund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Lo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Mans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 Velh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cã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c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a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eir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eiras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eir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eirinh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eirinh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eiro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et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inh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o Alt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o Alt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o Dur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o Pret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oc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olând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oquinh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os Cassa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o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uer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st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taguassu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talh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talh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tatais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Batayporã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turité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ur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yeux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bedou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berib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a Cruz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a Vista da Carob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a Vist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a Vist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a Vista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a Vista do Paraís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a Vist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a Vista do Told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a Vist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águ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ém de Mari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ém de São Francisc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ém do Brejo do Cruz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ém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ém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ém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ém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ford Rox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miro Bra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mont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mon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o Camp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o Horizon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o Jardim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o Mont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o Orien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o Val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lterr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neditino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nedito Leit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nedito Nov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nevide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njamin Constant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njamin Constant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nto de Abre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nto Fernande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nto Gonçalv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quim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ril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riza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rnardino Batist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rnardino de Camp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rnardo do Mearim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rnardo Sayã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rtio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rtolíni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rt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ruri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tâni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tâni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t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ezerro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ias Fort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ic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iguaçu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ilac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iquinh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irigu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iritiba-Mirim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iriting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ituru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lumenau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Esperança do I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Esperança do Su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Esperanç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Esperanç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Esperanç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Hor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Nov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entura de São Roqu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entu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agem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sta da Aparecid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sta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sta do Buric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sta do Cadea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sta do Gurupi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sta do Inc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sta do Ramos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st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sta do Tupim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st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a Vista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ca da Mat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ca do Acre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cain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caina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cain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cain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Bocaiúva do Sul-P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Bocaiú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dó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docó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doquen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fe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itu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Conselh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Despac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ardim da Ser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ardim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ardim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ardim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ardim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ardim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a Lap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a Pe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a Ser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as Selv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o Ampa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o Aragua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o Gal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o Itabapoan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o Norte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o Oes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o Tocantin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 dos Perdõ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Jesu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Lugar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Princípi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Princípi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Progress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Repou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Retiro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Retir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Sucesso de Itararé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Sucesso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Suces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Sucess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 Sucess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mbinha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fim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f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fim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finópolis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fi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ina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ito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ito de Santa Fé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it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it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it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it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queirão do Le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queirã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queirã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quim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qui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rá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Boracé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rb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rborem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rbore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rda da Ma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reb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rraz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ssoroc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telh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tucat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tumir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tuporã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tuverá-SC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Bozan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ço do Nor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ço do Trombud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g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gança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ganç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ganey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nquinh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ás Pir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sil Nov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silândi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silândia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silândia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silândia-MS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Brasiléia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sileir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síli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sília-DF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snor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s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ú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ú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azabrante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ã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etub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inho de Nazaré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inh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inh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o Alegr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o da Madre de Deu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o de Arei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o do Cruz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o dos Santo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o Grande do Aragua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o Grande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o Sant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õ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jolând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u Branc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eve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itân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ochier-RS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Brodowsk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otas de Macaúb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ot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umadin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umad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unópoli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rusqu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eno Brandã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e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enos Aire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erarem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gr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íqu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jari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jaru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a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 Alegr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 Brav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 dos Lop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 dos Mont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cupu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ram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ran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s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z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ritizei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uti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apirang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aporã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arapó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ati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aceiras do Paraguaç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aceir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eceira Gran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eceiras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eceira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edel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ixi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o de Santo Agostinh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o Fri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o Ver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rália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reú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brobó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çador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çapav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çapa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aulândia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equ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ácere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Alt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da Pra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de Pajeú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do Arari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do Piri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dos Índio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Dourad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Dourad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Grand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as de Macacu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inh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in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inh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hoeiro de Itapemirim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imba de Arei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imba de Dentr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imb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imbinha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ique Dobl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oal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onde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açu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cul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ém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eta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etano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et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eté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etit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farnaum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fea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felând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felând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fezal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ab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a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apôn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baté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bi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çara do Nort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çara do Rio do Vent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ça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ça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có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eir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r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iu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amar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apió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ari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at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azeiras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azeir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azeirinh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ob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ueiro da Prai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ueir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ur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jur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çad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çoene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das Brandã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das Nova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d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dazinh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deirão Grande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deirão Grand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ifórn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mon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umbi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acan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açar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ac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alaú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am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anduca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apuã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aquã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aragib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arg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bará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bar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bé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bi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boriú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buci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bu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buqu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et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ocim de São Félix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ocim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anár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a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estre da Ser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estre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estre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estr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estr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a da Lago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a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a do Monte Alegr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a do Simã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a Grande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a Grand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a Ver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açu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ápoli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as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as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inort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Alegre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Alegre de Lourd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Alegre do Fidalg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Alegr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Alegr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Azu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Belo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Bel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Bom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Bonit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de Santan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do Brit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do Me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do Tenente-P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ampo Erê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Flori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Formos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Grande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Grand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Grande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Larg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Larg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Limpo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Limpo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Magr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Maior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Mourã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Novo de Rondônia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Novo do Pareci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Nov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Redond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 Verd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Alt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Belo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Borg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de Júli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do Jordã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dos Goytacaze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Gera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Lindo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Novos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Nov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Sale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pos Verde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mutang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a Ver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aã dos Carajá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aã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abrava do Norte-MT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anané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api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ápoli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á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ara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aran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avieir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avieir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deal-BA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andeias do Jamari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dei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dei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delár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di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ândido de Abre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ândido Godó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ândido Mende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ândido Mo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ândido Rodrigu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ândido Sal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diot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dó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el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elinh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guaretam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guçu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hob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hotinh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indé de São Francisc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indé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itar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o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oinha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sançã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tá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tagal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tagal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tagal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tanhed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to do Buriti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udos do Val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udo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nutam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anem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anem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ão Alt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ão Bonito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ão Boni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ão da Cano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ão do Cipó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ão do Le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araó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ela de Santan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ela do Alto Alegr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ela do Al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ela No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el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el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el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e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m Branc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m Gross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m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nzal do Nort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nza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stran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tão Andra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tão de Campo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tão Ené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tão Gervásio Oliveir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tão Leônidas Marque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tão Poç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t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tól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vari de Baix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vari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var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ixaba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oeira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put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caraí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col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col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guatatu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íb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mbe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naí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nd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ngol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pebu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picuí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uari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úbas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úb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úb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vel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azin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boni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deal da Silv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doso Moreir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dos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eaç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eiro da Várze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eiro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iacic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idade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idad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inhanh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ir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iré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iri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iriaçu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iú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lind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l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los Barbos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los Chag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los Gom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és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o da Cacho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o da Ma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o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o do Cajur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o do Paranaí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o do Rio Cla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o do Rio Verd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olând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ópolis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mópoli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naíb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naúba dos Dant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naubai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naubal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naubeira da Penh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neirin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neiro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oebe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olin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pin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ranc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rapatei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rasco Bonit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uaru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utaper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valh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rvalh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a Branc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a Gran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a Nov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c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calho Ric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cavel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cave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ear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eir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imiro de Abreu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inha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serengu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ássia dos Coqueir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áss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silândi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tanhal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tanheir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tanheiras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te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tel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tel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til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tro Alv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str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aguas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alã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andu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anduv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anduva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arin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as Altas da Norue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as Alt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end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igu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inguei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olând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olé do Roch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uíp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uj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und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uraí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uram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urité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tut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ucai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valcant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xambu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xamb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xias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xi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xingó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ará-Mirim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dral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dr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dro de São Joã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dro do Abaet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dr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dr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lso Ram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ntenário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ntenári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ntenári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ntral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ntral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ntra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ntrali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ntro do Guilherm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ntro Novo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ejeiras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e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queira César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quil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rit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ro Az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ro Branc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ro Corá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ro Grande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ro Grand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ro Larg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rro Negr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sário Lang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éu Az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zarin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ã de Alegri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ã Grand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ã Pret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áca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l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pada da Natividade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pada de Are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pada do Nor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pada dos Guimarãe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pada Gaúc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pad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padão do Céu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padão do Lagead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padão do Sul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padinh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pecó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rquead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rquead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rru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val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vant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ve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iador-MG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hiapett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opinzinh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oró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orozinh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orrochó-BA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hu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upinguaia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uvisc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ianor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ícero Dant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idade Gaúch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idade Ocidental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idelândi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idrei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ipó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ipotâne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iríac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larava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laro dos Poçõ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láud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láud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lement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levelând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arac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ari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cal de Telh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cal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cal dos Alv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cal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calinh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calzinho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co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dajás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dó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elho Net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imbra-MG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oité do Nói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ivara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are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atin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íder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inas do Sul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inas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in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inas-RS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olmé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niz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ômb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ombo-P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olônia do Gurguéi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ôni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ônia Leopoldin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orado do Oeste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orad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ora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lu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mbinad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mendador Gom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mendador Levy Gasparian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mercin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modor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a Aparecid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a Barr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a Barr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a Fei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as Alago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as Pedr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e Ipane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e Macabu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o Almeid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o Aragua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o Canindé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o Castel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o Coit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o Jacuípe-BA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onceição do Lago-Açu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o Mato Dent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o Par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o Rio Ver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 dos Our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eiçã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h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h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órdia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córdi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dad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dad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d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d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deú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dor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ônego Marin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fin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fres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g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gonha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gonhas do Nor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gonh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gonhinhas-P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onquista D'Oes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quis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selheiro Lafaie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selheiro Mairinck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selheiro Pe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solaçã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stantin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tage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tend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ntendas do Sincor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queira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queiro Baix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queiro Sec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queiros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ação de Jesu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ação de Mar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bél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deir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deir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deiro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dilheira Al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disburg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dis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eaú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em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guinh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ib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in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nélio Procópi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ac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ad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atá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mande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Barr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Bicac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Domingos Soare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Ezequiel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Fabrician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Freita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João Pesso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João S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José Dia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Maced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Martin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Mur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Pachec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Pilar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Sapucai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Vivid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onel Xavier Chav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órrego Dan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órrego do Bom Jesu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órrego do Our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órrego Fun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órrego Nov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reia Pint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rente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rente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renti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tê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umbá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umbá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umbaíb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umbataí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umbat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umbiara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upá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rurip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sm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smora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sta Marques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sta Ric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tegip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t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tiporã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triguaçu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uto de Magalhães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uto Magalhãe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xil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xim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xixol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aíba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ateú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at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avinh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avolând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ciúm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óli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ópoli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siuma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ais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a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al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a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alândi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alând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ál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alin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iano Oton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ia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i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inápoli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ino Castr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stópoli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xás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ix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oatá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omín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ci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 Alt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 das Alm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 do Espírito Sant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 Machad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ál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altens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eiro da Fortalez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eiro do I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eiro do 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eiro do Sul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eiro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eiro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ei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et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íl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ruzmalti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batã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bati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iabá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ité de Mamanguap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ité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itegi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jubim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mari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maru do Norte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maru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mbe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nha Porã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nh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nhataí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paraqu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pir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aç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imatá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ionópoli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itib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itiban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iúv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rais Novo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rai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ral de Cim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ral de Dent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ral Nov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ral Velh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ralinh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ralinho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u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uç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urupu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velând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rvel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stódi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utias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mia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miã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mo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rcinópoli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ário Mei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t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vid Canabar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vi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vinópoli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lfim Mor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lfi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lmiro Gouvei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l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merval Lobã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nis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odápolis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putado Irapuan Pinheir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rrubad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scalvad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scans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scober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sterro de Entre Ri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sterro do Mel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sterr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zesseis de Novemb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adem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Diamante D'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amante do Nor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amante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amant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amanti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amantin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anópoli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as d'Ávil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lermando de Aguiar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ogo de Vasconcel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onísio Cerquei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onís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oram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rce Re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rceu Arcoverde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na Pastor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nés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no das Laranjeir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no de São Lourenç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n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nolândi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nolând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nópolis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nópolis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sa Alegr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sa No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s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brad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is Córreg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is Irmãos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is Irmãos do Buriti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is Irmãos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is Irmã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is Lajead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is Riacho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is Vizinho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lcin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Aquin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Basíli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Bosc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Cavat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Eliseu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Expedito Lop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Felician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Inocênci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Joaqu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Macedo Cost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Pedrit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Pedro de Alcânta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Pedr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Silvér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 Viço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ingos Martins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mingos Mourã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na Emm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na Euséb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na Francisc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na Inê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res de Camp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res de Guanhã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res do Indai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res do Rio Pret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res do Turv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res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rmente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uradin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uradi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urad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uradoqua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urados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utor Camarg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utor Maurício Cardos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utor Pedrinh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utor Ricar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utor Severian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utor Ulysse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ver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race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uart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uas Barra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uas Estrad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ueré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umont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uque Bacelar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uque de Caxia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urand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chapor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coporang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dealina-GO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dé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irunepé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ldorado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ldorado dos Carajá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ldorad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ldorad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lesbão Velos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lias Faus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liseu Martin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lisiári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lísio Medrad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lói Mend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m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mbaú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mbu-Guaç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mb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milian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canta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cant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cruzilhad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cruzilhad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éas Marque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genheiro Beltrã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genheiro Cald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genheiro Coel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genheiro Navar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genheiro Paulo de Frontin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genho Vel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tre Folh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tre Rios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tre Rios do 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tre Rios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tre Rio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tre Ri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tre-Ijuí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vir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pitaciolândia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quador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rebang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rechim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rerê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Érico Cardos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rm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rnestin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rval Grand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rval Sec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rval Velh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rvál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cad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merald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merald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era Feliz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eranç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erança Nov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eranç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erantin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erantin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erantinópoli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igão Alto do Iguaçu-P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spigão D'Oeste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inos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írito Santo do Doura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írito Santo do Pinh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írito Santo do Turv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írito Sant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lanad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pumos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aç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ância Vel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ânci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ei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iva Gerb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i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reit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rela d'Oes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rela Dal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rela de Alagoa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rela do Indai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rela do Nort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rela do Nor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rela do Su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rela Vel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trel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uclides da Cunha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uclides da Cunh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ugênio de Cast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uge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unápoli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usébi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wbank da Câma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xtre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xtremoz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xu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gundes Varel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gunde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in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ria Lem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rias Brit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r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ro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rroupil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rtur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rtu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átima do Sul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átim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átim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xinal do Soturn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xinal dos Guede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xina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xinalzin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zenda Nov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zenda Rio Grand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azenda Vilanov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ijó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ira da Mat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ira de Santa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ira Grand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ira Nova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ira Nov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ira Nov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lício dos Sant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lipe Guerr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lisburg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lix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liz Desert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liz Natal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liz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ênix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nandes Pinheir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nandes Tourin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nando de Noronh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nando Falc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nando Pedroz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nando Prest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nand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nã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raz de Vasconcel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reira Gomes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reiro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r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ervedou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iguei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igueirão-MS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Figueirópolis D'Oes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igueirópoli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iladélf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iladélf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irmino Alv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irmi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exeira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 da Serra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 do Sertã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a Ric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Flor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âni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s da Cun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s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s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sta Azu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sta do Aragua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st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st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st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sta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est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iano Peixot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ian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orianópoli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órida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lórida-P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Florín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nte Bo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ntoura Xavier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mi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miguei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mosa da Serra Negr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mosa do 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mosa do Rio Pret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mosa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mos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moso do Aragua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mos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mo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quetin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quilh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quilhinh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talez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taleza do Tabocã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taleza dos Nogueir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taleza dos Val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talez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tim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tun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rtun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z do I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oz do Jordã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iburg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nópoli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sco Alve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sco Ayr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sco Badaró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sco Beltrã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sco Dant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sco Dumont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sco Maced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sco Mora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sco S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sco Santo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isc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anco da Roch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echeirinh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ederico Westphalen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ei Gaspar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ei Inocênc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ei Lagoneg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ei Martinh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ei Miguelinh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ei Paul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ei Rogéri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onteira dos Val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ont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onteira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uta de Lei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uta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rutuoso Gome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undã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uni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briel Montei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do Brav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áli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Galilé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linho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lvã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meleir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meleir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meleir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nd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ranhun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raru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rç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ribald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ropab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rrafão do Norte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rruch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ruv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spar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stão Vidig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úcha do Nor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uram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vião Peixo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viã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minian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neral Câma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neral Carneir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neral Carneir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neral Maynard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neral Salgad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neral Sampai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nti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ntio do Our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tul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túlio Varg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ilbué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irau do Poncian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iru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lauci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licério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Glória D'Oes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lória de Dourados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lória do Goitá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lór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lorin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dofredo Vian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doy Morei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b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n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n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ná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ndir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nésia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nés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ân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ninh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nir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norte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atub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oerê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ioxim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nçalves Di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nçalv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ngog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nza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uve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uve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vernador Archer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vernador Celso Ram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vernador Dix-Sept Rosad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vernador Edison Lob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vernador Eugênio Barro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vernador Jorge Teixeira-RO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Governador Lindenberg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vernador Luiz Roch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vernador Mangabei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vernador Newton Bell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vernador Nunes Freir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overnador Valadar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ça Aranh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ç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cho Cardos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jaú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mado dos Loureir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mado Xavier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ma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ndes Rio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nit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nj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njeir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ão Mogo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ão Pará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vatá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vata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vata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oaíra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osso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upia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biju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birub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çuí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dalupe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íb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iça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imbê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í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í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iraç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iúb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jará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jará-Mirim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jer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maré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mirang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namb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nhã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p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piaç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pia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pimirim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piram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pó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poré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porem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bi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ç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c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c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ciaba do Nort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cia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ciab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cia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í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ít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mirang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mirim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nés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ni d'Oes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ni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ni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n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ni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ntã do Nor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nt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pari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puav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queçab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r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rap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re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ting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tinguet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atub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da-Mor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e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i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iba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ino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ujá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uj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rulh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tambú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tapar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axup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ia Lopes da Lagun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idova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imarãe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imarân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irating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irice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rinhatã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rinhém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rjã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rup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rupi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uzolând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armon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eitoraí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eliodo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eliópoli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erculând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erval d'Oes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erva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erveir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idrolândi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idro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idrolin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olamb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onório Serp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orizont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orizontin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ortolând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ugo Napoleã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ulha Neg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umaitá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umait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umberto de Campo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aca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aciar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acr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aç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ap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ar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ati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ait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aram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aretam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até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ateguar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atib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em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ertio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aç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am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apin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a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assucê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caraí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caré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coa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cuí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cuiting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mirim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pe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pitang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porã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que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acat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ac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açu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aiar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ajub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am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apitang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apuã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apuitã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are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ata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it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rub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tia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ti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tiram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tit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tiúr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turu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iú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otiram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capuí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ça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caraí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caraím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catu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cém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ch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có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conh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elmo Marinh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epê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ci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porã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raçu do Tietê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racy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rapa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rapé do Mei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rapé Grand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rapé-Açu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rap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rapé-Miri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rassu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rat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ara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rapiú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reja Nov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rejin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uaba Grande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uaí-BA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Iguap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uaraci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uar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uata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uatemi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uatu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guat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jac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ju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lha Comprid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lha das Flore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lha de Itamaracá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lha Grande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lha Soltei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lhabel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lhéu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lho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licíne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lópoli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maculad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maruí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mbaú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mbé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mbé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mbitub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mbituv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mbui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migrant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mperatriz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ácio Martin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acio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ajá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aj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confident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aiab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aia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aiatu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ependênci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ependênc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ia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ia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ian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iapor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iar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iarob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diavaí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gá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g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gazeir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hacor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hambup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hangapi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hapi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hap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haú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hum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huma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imuta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ocênci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úbia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omerê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a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ameri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ane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anguaçu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aporang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a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aumirim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auss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ê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ecaet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eró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eú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iaç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iaú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igu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irá-BA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Ipi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irang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iranga do Nor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irang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irang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irang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ixuna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ixun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ojuc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orã do Oes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orá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orã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ora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u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u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uaçu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ubi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ueir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ueira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ueiras-TO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Ipuiú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umirim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pupia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cema do 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cem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cema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cemá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ceminh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í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ju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ma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ndub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ni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pu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pur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qua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r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t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ti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auçub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ecê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etam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ineópoli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itu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rupi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saías Coelh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srae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á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a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aian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aian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aianinh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el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er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era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eraí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i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ir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iri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oraí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bu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cajá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camb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caramb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car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coatiar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curub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curub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et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g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gib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gimirim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guaçu da Bah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guaçu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guaí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guajé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gua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guari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guaru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gua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íb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içab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inópoli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iópoli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ipava do Grajaú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ip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ipulând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iting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itub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já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já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jaí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job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ju do Colôn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j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jub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juíp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lv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araj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arandi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arati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arati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ar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bacur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barac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bé do Mato Dent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b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bé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bé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og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mon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nag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nhaém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nhand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nhangá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nhém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nhom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ob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óc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ocar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aci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agé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agip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aric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b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cerica da Ser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ceric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curu Mirim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jara d'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m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mirim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ru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run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tim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ting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tini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ev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icur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ipoc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i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irang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irang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irapuã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irapuã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ira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issum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itang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iún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oá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á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orã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orã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oranga d'Ajud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orang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ora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ororoc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uã do Oeste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uc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u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u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purang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quaquecetu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qua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qu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quiraí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quiting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ran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rantim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raré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rem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rir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rumã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t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tiai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tiaiuç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tib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ti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tim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ti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tir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tub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ú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ú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úb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ubal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uçu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ueir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úna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ú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avera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inga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iquir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irap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irapu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iruç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iú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ob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ororó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aç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ber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e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iuta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mbiar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mir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pe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pirang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porang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ra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uvera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uiú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ún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v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vaiporã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vaté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vatub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vinhem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vo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vor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vot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boatão dos Guararape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borá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borand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borand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bot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boticab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boticab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boticatub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çanã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arac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araú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aré dos Homen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areacang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are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arezinh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iar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into Machad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in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obin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obi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u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uíp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uizin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und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upira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u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cuting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pitã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qua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aç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ar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é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etam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iaív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ibar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ib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ip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iú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uan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guarun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í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icó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l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mbei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mpruc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naú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ndaia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nda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ndaí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ndaír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ndi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nduí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ngad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ni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nuár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nuário Cicc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paraí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parating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paratub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peri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pi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pi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poatã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ponvar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porã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purá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pur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queir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quiran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aguá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aguá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aguari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amatai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dim Alegr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dim de Angico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dim de Piranh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dim do Mulat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dim do Seridó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dim Olind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dim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dim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dinópoli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din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in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ru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taí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taizinh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taúb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teí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ti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tobá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tobá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tobá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ú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ú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upaci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auru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cea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nipapo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nipapo dos Vieir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quer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quiá da Prai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qui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quit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quitib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quitinho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remoab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ricó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riqua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rônimo Monteir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rumenh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suân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suít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esú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i-Paraná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ijoca de Jericoacoar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iquiriç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itaú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açab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aí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anés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an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ão Alfred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ão Câmar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ão Cost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ão Di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ão Dourad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ão Lisbo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ão Monleva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ão Neiv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ão Pesso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ão Pinhei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ão Ramal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aquim Felíc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aquim Gome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aquim Nabuc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aquim Pir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aquim Távo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ca Marques-PI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Jó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invill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rdân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rdão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sé Boiteux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sé Bonifáci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sé da Penh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sé de Freita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sé Gonçalves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sé Raydan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selândi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se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oviân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ar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arez Távo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arin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atu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azeirinh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azeiro do Nort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azeir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azeir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cá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cati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curuç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curutu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ín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iz de Fo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úlio Borg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úlio de Castilh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úlio Mesqui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mirim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nco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nco do Seridó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ndiá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ndiá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ndiaí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ndi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nqueir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nqueir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pi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piá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qui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quiti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ramen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rand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rem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rem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ripirang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ru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ruá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rua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ruen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ruti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scimeir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ssa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ssar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ssa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ssar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ssiap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taí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ti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uveníl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aloré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ábre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cerdópoli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da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dári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faiete Coutinh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amar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art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e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 da Pedr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 do Junc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 dos Rodrigue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 Verd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Alegre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Bonit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'Ant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a Cano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a Confusã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a Pra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e Dentr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e Pedr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e São Francisc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e Velho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 Barr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 Carr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 Itaeng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 Mat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 Our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 Síti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s Gato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s Pat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s Três Cant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Dourad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Formos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Grande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Gran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Grand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Nov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Rea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Salgad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Sant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San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Sec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 Vermel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inh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oinh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una Carapã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gun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 do Muriaé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ado do Bugr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ado Grand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ado Nov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a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ad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dã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dinh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do do Taboca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d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s Pintad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e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j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marão-BA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Lambari D'Oes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mbar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m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ndri Sal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p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pã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ranja da Terr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ranjal do Jari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ranjal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ranja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ranja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ranjeiras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ranjeira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ssanc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str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urentin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uro de Freitas-BA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Lauro Muller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vandeir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vín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vras da Mangabeir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vras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vr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avrinh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andro Ferr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bon Régi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me do Pra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m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nçóis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nçói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oberto Lea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opoldi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opoldo de Bulhõe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berato Salzan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berda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cínio de Almeid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dian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ma Campo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ma Duar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meira do Oes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mei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moeiro de Anadi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moeiro do Ajuru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moeiro do Nort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moeir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ndoeste-P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Lindóia do Sul-SC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Lindó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ndolfo Collor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nha Nov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nhares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n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vramento de Nossa Senho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vrament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zard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and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bat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gradour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ndri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nt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ntra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re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ret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urd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uvei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cas do Rio Verd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cél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cen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cianópolis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Luciar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créci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ís Antôni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ís Correi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ís Domingue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ís Eduardo Magalhã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ís Gome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isburg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is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iz Alve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izia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iziân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minári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nardell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pérci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pion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téc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z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zern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ziân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zilândi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uzinópoli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aé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aíb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ajuba-BA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açambar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ambir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apá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aparan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aran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atu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au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aub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aúb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edôn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eió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hacalis-MG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achadinho D'Oeste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hadin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ha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hado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iei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uc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curur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dalen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deir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dre de Deus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dre de Deu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ãe d'Águ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ãe do Ri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eting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f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galhães Barat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galhães de Almeid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gd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gé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iquiniqu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ir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irinqu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iripor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iripotab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jor Gercin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jor Isidor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jor Sale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jor Viei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lacache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lhada de Pedr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lhada dos Boi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lhad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lhador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llet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lt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manguap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mbaí-GO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amborê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mo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mpitub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acapuru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aí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aquiri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ari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aus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âncio Lima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da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daguar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diritub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dur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frin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garatib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gueirinh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huaç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humir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icoré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oel Emídi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oel Rib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oel Urbano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oel Vian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oel Vitorin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sidã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te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ntenópolis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quiné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 de Espa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 Vermelh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 Ros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ã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bá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b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caçumé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c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cajá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caju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canã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canaú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cá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gogi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gogip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ial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já do Sen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nguap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nhãozinh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panim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poa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t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taízes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ú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u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vilh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vilh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avilh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caçã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celând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celino Ram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celino Vieir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cionílio Souz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c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colândi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cos Parente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echal Cândido Rondon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echal Deodor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echal Florian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echal Thaumaturgo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em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a da F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a Hele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alv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ana Pimente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a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ano Mo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anópolis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á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bond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cá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lac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lândia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lândi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le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íl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luz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ng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n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ário Camp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pá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p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tub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izópoli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liér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meleir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mel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ques de Souz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quinh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tinho Camp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tinópol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tin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tins Soar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tin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uim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umb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rzagã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scot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ssapê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ssapê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ssarandub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ssarandub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a de São Joã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a Grand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a Rom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a Ver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ã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arac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eiro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elând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er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eus Lem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hias Loba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ias Barbos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ias Cardo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ias Olímpi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i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inh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inh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inho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ipó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o Castelhan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o Gross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o Leit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o Queima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o Ric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o Ver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ões do Nort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õe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os Cos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ozinhos-MG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atrinchã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riz de Camaragib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upá-MT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aturéi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tuti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uá da Ser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u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ués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urilândia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uri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uriti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xaranguap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ximiliano de Almeid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zagão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deiros Net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deir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dianei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dicilând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di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leir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lgaç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ndes Pimente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nde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ndonç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rcede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rcê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ridian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ruoc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s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squi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squit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ssias Targin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ssia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guel Alv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guel Calmon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guel Leã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guel Pereir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guel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lagres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lagr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lagre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lhã-CE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ilton Brandã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moso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moso do Sul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naçu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nador do Negrã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nas do Le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nas Nov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ndur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neiros do Tietê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neiro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nistro Andreazza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 Estrel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bel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cat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cema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cem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dor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dor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dou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gua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ím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nda do Nort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nd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ndib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nd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nga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norte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nte da Serra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nte do Paranapane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nt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selv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ssol d'Oes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sso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ssolând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avân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im Doc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rinzal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ssa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ssão Velh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cajub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coc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del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ed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e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geir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gi das Cruz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gi Guaç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iporá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ita Bonit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ji Mirim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ju-PA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ojuí dos Campo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mbaç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mbuc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ç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çõ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daí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gagu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jol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senhor Gil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senhor Hipólit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senhor Paul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senhor Tabos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ad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alvân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anh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anh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aur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legre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legre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legre de Sergipe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legre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legre do Su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legre dos Camp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legre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legr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l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prazíve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zul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Azu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Belo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Bel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Carl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Carmel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Castel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Castel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das Gameleir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do Carm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Formo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Horeb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Mor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Negro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Santo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Santo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Sant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 Siã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iro Loba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ir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irópoli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neg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s Alto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s Claros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s Clar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ezu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ividiu do Nort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ividiu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ada Nov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ada Nov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aúj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eilândi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eira Sale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en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maç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par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ete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inhos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inho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inho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 Agudo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 Agud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 Cabeça no Temp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 da Fumaç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 da Garç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 do Chapéu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 do Chapé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 do Pilar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 Grand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 Redon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 Reuter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ro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tuga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runga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ssâmede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ssoró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stard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tuc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zar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an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cajaí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camb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cugê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çum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cur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curici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itos Cap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litern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lungu do Morr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lungu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lungu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ndo Nov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ndo Nov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ndo Nov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nhoz de Mel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nhoz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niz Ferrei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niz Freire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quém de São Francisc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qui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ria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ribec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rici dos Portela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rici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ricilând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riti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rutinga do Su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tuíp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tu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tu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uzambin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cip Raydan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nt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nuqu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ão-Me-Toqu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qu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randi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tal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ta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térc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tividade da Ser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tividade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tividade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tub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vegante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viraí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zaré da Mat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zaré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zaré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zar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zaré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zaren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zarezinh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zári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eópoli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epomucen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er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eves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hamundá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handea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icolau Verguei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ilo Peçanh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ilópoli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ina Rodrigue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inh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ioaque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ipo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ique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ísia Florest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iterói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bre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noa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rdesti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rmandia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rtelând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ssa Senhora Aparecid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ssa Senhora da Glóri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ssa Senhora das Dore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ssa Senhora das Graç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ssa Senhora de Lourde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ssa Senhora de Nazaré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ssa Senhora do Livrament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ssa Senhora do Socorr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ssa Senhora dos Remédio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Aliança do Iv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Alianç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Alvorada do Sul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Alvorad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América da Coli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Améric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Andradin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Araç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Auror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Auro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Bandeirante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Bassan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Belé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Boa Vista-RS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Nova Brasilândia D'Oeste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Brasilând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Brésc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Camp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Canaã do Nor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Canaã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Canaã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Candelár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Cant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Castil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Colin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Crix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Cruz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E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Erechim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Esperança do Piri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Esperança do Sud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Esperanç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Esperanç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Europ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Fátim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Fátim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Florest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Friburg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Glór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Granad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Guarit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Guatapora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Hartz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Ibi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Iguaçu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Iguaçu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Independênc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Iorqu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Ipixun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Itaberab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Itara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Lacerd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Laranjeir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Li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Londri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Luzitân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Mamoré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Marilând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Maringá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Módic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Monte Verd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Mutum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Nazaré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Odess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Olímp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Olímp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Olinda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Olinda do Norte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Olind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Olind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Olind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Pádu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Palm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Palmei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Petrópoli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Pon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Porteir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Prata do I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Prat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Ramad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Redençã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Resen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Rom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Rom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Rosalând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Russa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Santa Bárba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Santa Helen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Santa Rit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Santa Rit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Santa Ros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Serra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Sour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Teb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Timboteu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Trent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Ubiratã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Uniã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União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Venéci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Venez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Venez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Viços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 Xavantin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a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Acord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Airão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Alegre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Aripuanã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Barrei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Brasil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Cabrai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Cruzei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Gam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Hamburg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Horizonte do Nor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Horizonte do Oeste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Horizonte do Sul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Horizont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Horizon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Horizon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Itacolom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Jardim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Lin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Macha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Mund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Oriente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Oriente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Orient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Planalt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Progress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Repartiment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Santo Antôni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Santo Antôni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São Joaquim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Tiradent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Triunf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 Xingu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vorizon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upora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Óbido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car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cauç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eiras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eira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iapoque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ar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Óle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ho d'Água das Cunhã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ho d'Água das Flore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ho d'Água do Casad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ho D'Águ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ho d'Água Grand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ho d'Águ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ho-d'Água do Borge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hos-d'Águ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ímp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ímpio Noro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inda Nova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ind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indi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ivedo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iveira de Fátim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iveira dos Brejinho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iveira Fort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iv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livenç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nça de Pitangu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nda Verd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ratóri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rien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rindiú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riximin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rizânia-MG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Orizon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rlând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rlean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robó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rocó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ró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rtiguei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sasc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scar Bressan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sóri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svaldo Cruz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tacílio Cos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ém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içang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icuri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ilândia do Norte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inh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izo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Branc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Branc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Branc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Fin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Preto do Oeste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Pre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Velh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Verde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Verde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Verde do 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Verd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 Verd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es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rolând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uvidor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caemb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caj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caju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caraima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catub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catub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ço do Lumiar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coti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cujá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dre Bernard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dre Carval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dre Marco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dre Paraí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es Landim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i Ped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ia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içand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im Fil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ineir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ine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in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i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jeú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estin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estina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estin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est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han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hoç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a Sol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áci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ares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ares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are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as de Monte Alt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a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a d'Oes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a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a dos Índio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ai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ândi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ante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as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as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in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irópoli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el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i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ita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it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itin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it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m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loti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namá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namb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ncas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nela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nora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ntano Grand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ão de Açúcar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pagai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panduv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quetá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á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cambi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cat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curu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gomina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guaçu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guaçu-MG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ara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íba do Sul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iban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ibu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ipab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íso das Águas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íso do Nor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íso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íso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ís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ís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is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mbu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mirim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moti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á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ã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acity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agu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aíb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aiguar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aít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apane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apoem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apu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atam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ating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av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nhos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ope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pu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ri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ting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ty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ú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uapeba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ún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azinh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din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eci Nov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ecis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elh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iconh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intins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ipirang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ipueira-AL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ariquera-Aç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is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naguá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naíb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namirim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namirim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naram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robé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a e Fic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a Quat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a Set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a Tempo-MG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assa-Vin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abé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agem Franc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agem Franc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agem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agem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ir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o de Camaragib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o de Torre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o do Sobra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o Fun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os Mai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s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stos Bon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o Bragad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o Branc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os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os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o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rocínio do Muria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rocínio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rocín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u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y do Alfere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 Brasi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 D'Arc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 D'Arc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 D'Arc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 dos Ferro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dalh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ini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a Cândi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a Freitas-P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aulicé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ín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ino Neve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ist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ist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istan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istân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ist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o Afons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o Bent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o de Far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o Frontin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o Jacint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o Lope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ulo Ramo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vã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veram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vussu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é de Ser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abir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ça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erneir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Azu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Bel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Boni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Branca do Amapari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Branc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Branc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do An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do Indai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Dourad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Grand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Lavrad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Mole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Pret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 Pret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l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n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ã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s Alt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s de Fog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s de Maria da Cruz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as Grande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egul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ei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eir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inhas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inha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i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Afons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Alexandr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Avelin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Canári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de Toled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do Rosári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Gomes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II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Laurentin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Leopol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Osóri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Régi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Teix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dro Velh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ixe-Boi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ixe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ixoto de Azeved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juça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lot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nafort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nalv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ná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ndênci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ned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nh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ntecost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quer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qu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quizeir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digã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diz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dõ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eira Barre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eir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eir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i Mirim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iqui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itib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itoró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oba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érola d'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érol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o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uíb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scador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scaria Brav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squeir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trolândi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trolândi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trolin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trolin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trópoli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açabuçu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acat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ancó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atã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a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cada Café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çarr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co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cuí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edade de Cara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edade de Ponte No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edade do Rio Gran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edade dos Gera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edade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iên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lão Arcad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lar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lar do Su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lar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lar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lõe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lõe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lõezinho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menta Bueno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men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menteiras do Oeste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menteira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daí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damonhangab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indaré-Mirim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dob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dobaç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dorama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dora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doretama-CE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ingo-d'Águ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a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al da Ser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al de São Bent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al Grand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a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alã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alzinh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alzin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ã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ã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eiral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eirinho do Val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eiro Macha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eiro Pret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eir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heiros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tad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to Bandei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nt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o IX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o XII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querob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quet Carneir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que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ca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canjub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ce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cica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curuc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í do Nort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í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í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j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ju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ju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mbu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ng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nguç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nguin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nha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nha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pem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pe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pó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pora do Bom Jesu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po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pozin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qua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quê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ssunu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tin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tini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tub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aú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e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es do Ri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es Ferreir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ip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ipiri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iti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rpiritub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tang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tangueir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tangueir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tangu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timbu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um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úm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iumh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ca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ácido de Castro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naltina do Paran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naltin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naltin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nalto Alegr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nalto da Serr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nalt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nalt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nalt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nal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nu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t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ão de Pedr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ã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cinho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o Branc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o Dant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o das Ant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o das Trincheira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o de José de Mou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o Fun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o Redond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o Verde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õ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coné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ços de Cald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cran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juc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lon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mbal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mbo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merode-SC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ompéi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ompé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g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a de Pedra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a Gross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a Porã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al do Aragua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al do Paran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alin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alind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e Alta do Bom Jesu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e Alta do Nor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e Alta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e Al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e Branc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e Nov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e Pret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e Serrad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es e Lacerd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es Gest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o Bel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o Chiqu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o dos Volant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nto Nov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pul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ang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anga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angatu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ciúncul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ecat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alegr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eirã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eira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eir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el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e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Acre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Alegre do Nor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Alegre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Alegre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Alegr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Amazon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Barreir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Bel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Calv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da Folh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de Moz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de Pedra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do Mangu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dos Gaúcho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Esperidiã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Estrel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Feliz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Ferrei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Firm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Franc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Grande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Lucen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Mau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Murtinh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Nacional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Real do Colégi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Real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Rico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Ric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Segur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Uniã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Velho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Vera Cruz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Vitór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Walter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 Xavier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rt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ss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t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tengi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tim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tiragu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tirenda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tiretam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uso Alegr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uso Al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uso Nov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uso Redond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oxoré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cinh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cuúba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do Ferrei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d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d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d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ia Grand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ia Grand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ia Norte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inh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nchit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t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t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tân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tá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at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Alv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Bernard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Bernardes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residente Castello Branc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Castelo Branc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Dut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Dutr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Epitáci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Figueiredo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Getúli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Jânio Quadro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Juscelin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Juscelin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Juscelin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Kennedy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Kennedy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Kubitschek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Lucen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Médici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Médici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Nereu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Olegár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Pruden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Sarney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Tancredo Nev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Varg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idente Vencesla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imavera de Rondônia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imavera do Les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imaver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imaver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imeira Cruz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imeiro de Mai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incesa Isabel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inces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fessor Jamil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gress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missã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priá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tásio Alv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udente de Mora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udent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ugmil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urez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uting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uxinanã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ad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ara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artel Gera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arto Centenári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at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atigu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atipuru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ati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atro Barr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atro Irmã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atro Pontes-P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Quebrangul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edas do I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eimada Nov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eimad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eimad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eimado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eiroz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eluz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eluzi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erência do Nor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erênc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eved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jingu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lomb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nta do So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nta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nze de Novemb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papá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ri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ssamã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tandinh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terianópoli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xabá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xab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xabei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xadá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xelô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xeramobim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uixeré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afael Fernande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afael Godeir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afael Jambeir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afard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amilând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anchari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Rancho Alegre D'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ancho Alegr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ancho Queimad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apos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apos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aul Soar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alez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bouç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cif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cre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cursolând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denção da Serr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Redenção do Gurguéi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dençã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dençã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dento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du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eneraçã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ente Feijó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in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ist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lva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mans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mígi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nascenç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riutab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sende Cos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sende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serva do Cabaçal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serva do I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serv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splendor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ssaqu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stinga Sec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sti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tirolând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ão das Nev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ão do Bacamart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ão do Danta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ão do Jacuíp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ão do Poç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ã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in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inh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o da Cruz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o das Alma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o de Santa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o de Santan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o de Santo Antôni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o dos Cavalo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o dos Machad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o Fri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uel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chuel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lm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aná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amar Fiquen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as do Rio Pard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a do Ampar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a do Pomba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Boni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Branc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Cascalheir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Clar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Corren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das Nev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do Larg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do Pinha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do Su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dos Índi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Grand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Pir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Pre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 Vermel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ãozinh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o Gonçalv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beirópoli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fa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ncã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n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Aci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Az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Bananal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Bom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Bonito do I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Bonit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Branco do Iv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Branco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Branco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Branc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Brilhante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Casc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Clar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Cla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Crespo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a Conceiçã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as Anta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as Flore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as Ostra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as Pedr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e Cont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e Janeir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o Antôni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o Camp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o Fog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o Oes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o Pir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o Pra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oc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os Boi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os Cedr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dos Índi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Espe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Formos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Fortun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Grande da Ser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Grande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Grand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Larg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Man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Mar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Negrinh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Negr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Negr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Novo do Sul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Nov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Paranaí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Pardo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Par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Piracica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Pom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Preto da Ev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Pre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Quent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Rea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Rufin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Son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Tint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Verde de Mato Gross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Verd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 Vermel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lând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ozin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quez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tá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iversu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ca Sal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chedo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ched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deio Bonit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dei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dei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del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dolfo Fernande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drigues Alves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lador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lând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lant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lim de Moura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mar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melândi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ncador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nda Alt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ndin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ndolând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ndon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ndon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ndonópoli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que Gonzal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rainópolis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sa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sário da Lim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sário do Catete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sário do Iv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sário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sário Oes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sári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sei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teir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beli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biáce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biatab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bim-MG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Rubiné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rópoli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ssa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y Barbos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y Barbos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bar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báud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bin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bi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boeir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cramen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grada Famíl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gr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iré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danha Marin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es Olivei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esó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e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gadinh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gadinh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gado de São Félix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gado Filh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gad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gueir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inas da Margarid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inópoli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itr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mourã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oá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tinh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tin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to da Divis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to de Pirapo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to do Céu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to do Itararé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to do Jacu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to do Lont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to Grand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to Velos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vador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vador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vador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lvaterr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mbaíb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mpaio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anduv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cler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dolând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doval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gã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haró-PE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ant' Ana do Livrament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Adél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Albert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Amél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Bárbara d'Oes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Bárbar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Bárbara do Les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Bárbara do Monte Ver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Bárbara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Bárbar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Bárbara do Tugúr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Bárba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Bárba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Branc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Brígid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armem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ecília do Pavã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ecíli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ecíli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ecíli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lara d'Oes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lar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Cabrál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a Baixa Verd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a Conceiçã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a Esperanç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a Vitór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as Palmeir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e Monte Castel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e Sal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o Arari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o Capibarib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o Escalva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o Rio Pard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o Xingu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 dos Milagr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Cruz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Efigêni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Ernest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Fé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Fé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Fé do Aragua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Fé do Su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Fé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Filomena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Filomen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Filomen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Gertrud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Helen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Helen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Helen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Helen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Hele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Helen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Inê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Inê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Inê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Inê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Isabel do Iv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Isabel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Isabel do Rio Negro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Isabel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Isabe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Izabel do 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Julia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eopoldin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úc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úc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uz-PI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anta Luzia D'Oeste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uzia do Itanhy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uzia do Nort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uzia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uzia do Paruá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uz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uzi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uz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Luzi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garid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garid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a Boa Vist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a Ser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a Vitór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as Barreira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e Itab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e Jetibá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o Cambucá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o Herva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o 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o Sal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o Suaçu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 Madalen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aria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erced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Mônic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Quitéria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Quitéri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'Oes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e Cald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e Cáss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e Ibitipoc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e Jacu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o Aragua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o Itue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o Novo Destin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o Pardo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o Passa Quat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o Sapuc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 do Tocantins-TO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anta Rita do Trivelat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it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osa da Ser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os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osa de Lim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osa de Lim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osa de Viterb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os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osa do Purus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osa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osa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Ros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Sale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s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sinh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sinh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z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za do 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za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z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zinh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zinha de Itaip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zinha do Progress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zinha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zinh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zinh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Terezinh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Vitória do Palmar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 Vitór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luz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a Boa Vist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a Ponte Pens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a Varge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e Cataguas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e Manguei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e Parnaí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e Pirapa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Acaraú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Aragua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Cariri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Deser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Garambé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Ipanem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Itararé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Jacar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Manhuaç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Mato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Mundaú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Paraí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Riach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São Francisc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 Seridó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s Garrote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 dos Mont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nópoli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rém Nov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rém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arém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iago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iag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fons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maro da Imperatriz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maro das Brota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maro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mar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astáci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dré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dré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Ângel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a Alegr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a Barr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a Patrul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a Plati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e Jesu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e Lisbo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e Pádu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e Poss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Ampa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Aracangu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Aventurei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Caiu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Descobert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Gra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Içá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Itamb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Jacin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Jardim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Les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Leverger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Mon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Palm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Paraís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Pinh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Planalt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Reti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Rio Abaix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Sud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 Tau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s Lope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 dos Milagr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ntôni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August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Crist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Estêvã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Expedito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Expedi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Hipóli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Ináci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 Ináci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ópolis do Aguape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s Dumont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nt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edito do Rio Pret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edito do Sul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edito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tinh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to Aba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to do Nort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to do Sapuc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to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to do Tocantins-TO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ão Bento do Trairí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to do Un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t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nt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rnardin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rnardo do Camp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ernard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onifáci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orj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rás do Suaçu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rá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Braz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Caetano de Odivela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Caetano do Su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Caitan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Carlos do Iv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Carl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Carlos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ão Cristovão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Cristóvã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esidéri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 das Dor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 do Aragua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 do Azeit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 do Capim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 do Cariri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 do Norte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 do Pra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Domingos-SE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ão Felipe D'Oeste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elip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élix de Bals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élix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élix do Araguai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élix do Corib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élix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élix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élix do Xingu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élix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ernand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idéli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e Assis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e Assi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e Itabapoan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e Paul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e Paul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e Sal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o Brej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o Cond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o Glór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o Guaporé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o Oest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o P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Francisc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abriel da Cachoeir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abriel da Palh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abriel do Oeste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abrie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abrie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eraldo da Pieda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eraldo do Aragua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eraldo do Baixi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eral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onçalo do Abaeté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onçalo do Amarant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onçalo do Amarante-RN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ão Gonçalo do Gurguéi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onçalo do Par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onçal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onçalo do Rio Abaix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onçalo do Rio Pre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onçalo do Sapuc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onçalo dos Campo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onçal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Gotar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erônimo da Ser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erônim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Batista do Glór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Batist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Batista-SC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ão João d'Alianç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Baliza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Barr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Boa V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Canabrav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Fronteir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Lago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Ma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Paraún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Pont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Pon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Serr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Urtig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 Varjot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s Duas Ponte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as Missõ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e Irace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e Meriti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e Piraba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el Re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Aragua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Arraial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Caiu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Cariri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Carú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Itaperiú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Iv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Jaguarib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Manhuaçu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Manten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Oes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Orien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Pacu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Paraís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Paraí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Pau d'Al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Polêsin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Rio do Peix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Sabugi-RN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ão João do Soter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Tigr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 Triunf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dos Pato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Evangelis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 Nepomucen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ã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aquim da Bar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aquim de Bic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aquim do Mont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aquim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rge d'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rge do Iv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rge do Patrocíni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rg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 Bar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 Bela V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 Boa Vist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 Coroa Grand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 Lagoa Tapad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 Laj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 Lap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 Saf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 Taper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 Varg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 Vitór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as Palmeira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e Caian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e Espinhar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e Mipibu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e Piranha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e Princes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e Ribamar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e Ubá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Alegr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Barrei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Belmont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Bonfim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Brejo do Cruz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Calçad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Campestr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Cedr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Cerrit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Divin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Divin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Egit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Goiaba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Herva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Hortênci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Inhacor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Jacuíp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Jacur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Mantimen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Nort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Ou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Peixe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Pov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Rio Clar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Rio Pard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Rio Pre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Sabugi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Seridó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Vale do Rio Pret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 Xingu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s Ausent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s Basílio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s Camp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s Cordeiro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s Pinha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s Quatro Marco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 dos Ramo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osé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Juliã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eopol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ourenço da Mat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ourenço da Ser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ourenço do Oes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ourenç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ourenço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ourenç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udger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uís de Montes Belo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uís do Curu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uís do Paraitinga-SP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ão Luis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uís do Quitunde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uís Gonzaga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uís-MA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ão Luíz do Nort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uiz Gonzag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Luiz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amed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anoel do Paran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anue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arc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artinho da Ser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artin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artinh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ateus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ateus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ateus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Arcanj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a Baixa Grande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a Boa Vis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as Mat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e Taipu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Aleix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An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Aragua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Fidalg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Gostos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Guam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Guaporé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I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Oes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Passa Quatr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Tapui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s Campo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 dos Milagre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Miguel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Nicolau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atríci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aulo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aulo de Olivenç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aulo do Potengi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aul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a Água Branc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a Aldei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a Cip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a Ser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a Uniã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e Alcânta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o Buti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o I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o Iv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o Paran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o Suaçu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o Turv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os Crente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 dos Ferr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Ped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Rafael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Raimundo das Mangabeir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Raimundo do Doca Bezerr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Raimundo Nonat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Robert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Romã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Roque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Roque do Canaã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Roqu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alvador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a Amorei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a Bela Vis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a Boa Vist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a Gram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a Vargem Alegr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e Lagoa de Roç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Alt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An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Ca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Maranhã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Oes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Paraís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Pass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Rio Pre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Rio Ver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Uatumã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 do Umbuzeir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bastiã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epé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imã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Simã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Thomé das Letr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Tiag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Tomás de Aquin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Tomé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Tomé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Valentim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Valentim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Valério da Natividade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Valério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Vendelin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Vicente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Vicente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Vicente Ferrer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Vicente Ferrer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Vicent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ão Vicente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pé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peaç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pezal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pirang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popem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pucaí-Mir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pucai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puca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pucai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quarem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rand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rand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rapu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rdo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rutai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rze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átiro Di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tub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tubinh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uba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udade do I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udade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aúd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chroeder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ab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a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bastianópolis do Su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bastião Barro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bastião Laranjeir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bastião Leal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ber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de Nov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gred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lbach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lvíri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m-Peix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 Madureira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Alexandre Cost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Amaral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Caned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Cort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Elói de Souz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Firmin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Georgino Avelin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Guiomard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José Ben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José Porfíri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La Rocqu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Modestino Gonçalv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Pompeu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Rui Palmeir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Sá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ador Salgado Fil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gé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hor do Bonfim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hora de Oliv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hora do Port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hora dos Remédi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tinel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nto Sé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afina Corrê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ici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idó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ingueiras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éri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i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opédic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Al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Azul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Azu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Branc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da Raiz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da Sauda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de São Bent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do Mel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do Navio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do Ramalh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do Salitr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dos Aimoré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Dourad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Grand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Negra do Nort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Neg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Nova Dourad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Pret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Redond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 Talhad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n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no do Maran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nópolis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nópolis do Iguaçu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n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ari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inha dos Pinto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inh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inh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it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rolând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tanej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tâni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tanópoli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tão Santan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t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tãozinh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tãozinh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te Barr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te de Setemb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te Lago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te Quedas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tub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veriano de Almeid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veriano Mel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verín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derópoli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drolândi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gefredo Pachec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lva Jardim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lvân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lvanópoli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lveira Martin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lveirân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lveir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lves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lvia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mão Dias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mão Pere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mões Filh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mõ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mo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monés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mplício Mend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nimbu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nop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queira Campo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rinhaém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iriri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ítio d'Aba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ítio do Mat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ítio do Quint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ítio Novo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ítio Nov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ítio Novo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bradinh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bradinh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brad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bral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brál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corro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cor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lâne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ledade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ledade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ledad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lidã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lonópol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mbri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nor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oretam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roca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rris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ssêg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ure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us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uto Soare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cupira do Nort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cupira do Riachã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cupir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d Mennucc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l Brasi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li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maré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mé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midouro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rubim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ssuapar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zanápoli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uzan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ba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baporã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bapu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bating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bati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bir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boão da Ser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bocas do Brejo Velh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boleiro Grande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buleiro do Nort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buleir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caimbó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caratu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ci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curu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gu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guating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iaç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ilând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ió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iobeir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ipas do Tocan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ipu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iúv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lismã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mandaré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mara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mbaú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mboa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mboril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mboril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nab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ngará da Serr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ngará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ngará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nguá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nhaçu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nque d'Arc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nque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nque Nov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nquinh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aru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auá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eja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eja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e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ero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eroá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i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ir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ir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ir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iramut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irati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purah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açu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al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a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an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itinga do Nort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iti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itu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iva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uçu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quarussu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raba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rauacá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rrafas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rtarugalzinho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rum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rumirim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sso Fragoso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tuí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uá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ubaté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vare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var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fé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ixeira de Freit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ixeira Soares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ixeir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ixeir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ixeirópolis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juçuoc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jupá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lêmaco Borb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lh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nente Anani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nente Laurentino Cruz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nente Portel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nóri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odoro Sampai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odoro Sampai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ofilând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ófilo Oton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olândi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otônio Vilel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enos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esina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esin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esópoli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ezinh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ezópolis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ra Alt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ra Bo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ra de Are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ra Nova do Nort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ra Nov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ra Nov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ra Ric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ra Rox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ra Rox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ra Sant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souro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utôn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heobroma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anguá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bag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bau do Sul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bau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etê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grinh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jucas do Sul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juca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mbaúba dos Batista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mbaúb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mbé do Su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mbira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mbó Grand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mbó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mbur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mon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móte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o Hug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radentes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radent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ir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bias Barreto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cantín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cantinópoli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cantin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cos do Moji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le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led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ar do Geru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azin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bo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é-Açu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nantins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ritam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rixoréu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rop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rre de Ped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rr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rrinh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uros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abij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acuateu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acunhaém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aipu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airão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airi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ajano de Morae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amandaí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avessei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emedal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emembé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Arroi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Barras do Paran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Barra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Cachoeir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Coraçõe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Coro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de Mai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Forquilh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Fronteir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Lagoas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Mari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Palmeir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Pass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Pont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Rancho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ês Rio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evis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eze de Mai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eze Tília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indade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indade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indad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iunfo Potiguar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iunf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iunf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iunf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izidela do Val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omba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ombudo Central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barã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can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cumã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cunduv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curuí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filândi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iuti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miriti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nápoli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nas do Paraná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na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neiras do 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ntum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ã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aciguar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anating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anci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anciretã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and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arend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aretam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ãssi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i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iram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piratins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iaçu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ilândi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iú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malin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mali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uçu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uru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vân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velândi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v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v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vo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tói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arini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auá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á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aír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aitab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ajar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aporang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aran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atã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atub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era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er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irajar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iratã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biretam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cho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ibaí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iramutã-R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irapuru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iraún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lianópolis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mari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marizal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mbaúba-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mburanas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mburatib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mbuzeiro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mirim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muaram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aí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ião da Ser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ião da Vitór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ião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ião do Oeste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ião do Sul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ião dos Palmares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ião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ião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iflor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nistald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panem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aí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andi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âni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bano Santo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açu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ana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an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ará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bici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buretam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cân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cará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çuc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ç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cu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curituba-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guaian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oc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pá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pem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pê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ssang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rutaí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ting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car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e de São Domingos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e do Anari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e do Paraíso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e do So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e Rea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e Verd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enç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enç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enç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ent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entim Genti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inho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paraíso de Goiá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lparaís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nini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eão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em Alegr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em Alt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em Bonit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em Bonit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em Grande do Rio Pard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em Grande do Su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em Grande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em Grand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em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em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g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jão de Min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jã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jota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re-Sai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árzea Alegre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árzea Branca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árzea da Palm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árzea da Roç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árzea do Poç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árzea Grand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árzea Grande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árzea Nov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árzea Paulist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árze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árze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zedo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rze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ssouras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azant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nâncio Air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nda Nova do Imigrante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nha-Ver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ntania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nturos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a Cruz do Oeste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a Cruz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a Cruz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a Cruz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a Cruz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a Mendes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anópoli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dejante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de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ê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ed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edinh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íssim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melho Nov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tente do Léri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rtentes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spasiano Corre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espasian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aduto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amã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an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an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a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cência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cente Dutr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centina-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centinópolis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çosa do Ceará-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çosa-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ços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çosa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ctor Graeff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dal Ramo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deir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eira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eirópolis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gi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Bela da Santíssima Trindade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Boa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Flor-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Flor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Lângaro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Mar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Nova do Piauí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Nova do Sul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Nova dos Martírios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Pavã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Propício-G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Rica-M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Valério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a Velh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lhena-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nhed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radour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rgem da Lap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rgín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rginópolis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rgolândia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rmond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sconde do Rio Branco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seu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sta Alegre do Alto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sta Alegre do Prat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sta Alegre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sta Gaúch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sta Serrana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tor Meireles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tória Brasil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tória da Conquista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tória das Missões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tória de Santo Antão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tória do Jari-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tória do Mearim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tória do Xingu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tória-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torino Freire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torino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olta Grande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olta Redonda-RJ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otorantim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otuporanga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agner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all Ferraz-P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anderlândia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anderley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enceslau Braz-M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enceslau Braz-P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enceslau Guimarães-BA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Westfalia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itmarsum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Xambioá-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Xambrê-P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Xangri-lá-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Xanxerê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Xapuri-A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Xavantina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Xaxim-S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Xexéu-P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Xinguara-P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Xique-Xique-B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Zabelê-P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Zacarias-S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Zé Doca-M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Zortéa-SC</text:p>
          </table:table-cell>
          <table:table-cell/>
        </table:table-row>
        <table:table-row table:style-name="ro3" table:number-rows-repeated="104298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arametros_vertice" table:style-name="ta2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table:style-name="ce137" office:value-type="string" calcext:value-type="string" table:number-columns-spanned="1" table:number-rows-spanned="2">
            <text:p>Parâmetros para a tabela de Vértices</text:p>
          </table:table-cell>
          <table:table-cell table:number-columns-repeated="4"/>
        </table:table-row>
        <table:table-row table:style-name="ro2">
          <table:covered-table-cell/>
          <table:table-cell table:number-columns-repeated="3"/>
          <table:table-cell office:value-type="string" calcext:value-type="string">
            <text:p>* OBSERVAÇÕES</text:p>
          </table:table-cell>
        </table:table-row>
        <table:table-row table:style-name="ro2">
          <table:table-cell/>
          <table:table-cell table:style-name="ce138" office:value-type="string" calcext:value-type="string">
            <text:p>Campo</text:p>
          </table:table-cell>
          <table:table-cell table:style-name="ce138" office:value-type="string" calcext:value-type="string">
            <text:p>Valor</text:p>
          </table:table-cell>
          <table:table-cell/>
          <table:table-cell office:value-type="string" calcext:value-type="string">
            <text:p>- Reinicializar o arquivo para alterar os valores dos parâmetros</text:p>
          </table:table-cell>
        </table:table-row>
        <table:table-row table:style-name="ro2">
          <table:table-cell table:style-name="ce138" office:value-type="string" calcext:value-type="string">
            <text:p>Nome do vértice</text:p>
          </table:table-cell>
          <table:table-cell office:value-type="string" calcext:value-type="string">
            <text:p>Número caracteres p/ Técn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 Não alterar os locais das células de 'Campo' e 'Valor'</text:p>
          </table:table-cell>
        </table:table-row>
        <table:table-row table:style-name="ro2">
          <table:table-cell/>
          <table:table-cell office:value-type="string" calcext:value-type="string">
            <text:p>Separador de campo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 Não acrescentar novas linhas</text:p>
          </table:table-cell>
        </table:table-row>
        <table:table-row table:style-name="ro2">
          <table:table-cell/>
          <table:table-cell office:value-type="string" calcext:value-type="string">
            <text:p>Tipo de vértices</text:p>
          </table:table-cell>
          <table:table-cell office:value-type="string" calcext:value-type="string">
            <text:p>M;P;V</text:p>
          </table:table-cell>
          <table:table-cell/>
          <table:table-cell office:value-type="string" calcext:value-type="string">
            <text:p>- O campos são lidos na macro "Perimetro.setParamsVertice"</text:p>
          </table:table-cell>
        </table:table-row>
        <table:table-row table:style-name="ro2">
          <table:table-cell/>
          <table:table-cell table:style-name="ce140" office:value-type="string" calcext:value-type="string">
            <text:p>Tipo de limites</text:p>
          </table:table-cell>
          <table:table-cell table:style-name="ce140" office:value-type="string" calcext:value-type="string">
            <text:p>LA1;LA2;LA3;LA4;LA5;LA6;LA7;LN1;LN2;LN3;LN4;LN5;LN6</text:p>
          </table:table-cell>
          <table:table-cell table:number-columns-repeated="2"/>
        </table:table-row>
        <table:table-row table:style-name="ro2">
          <table:table-cell/>
          <table:table-cell table:style-name="ce140" office:value-type="string" calcext:value-type="string">
            <text:p>Tipo de posicionamentos</text:p>
          </table:table-cell>
          <table:table-cell table:style-name="ce140" office:value-type="string" calcext:value-type="string">
            <text:p>PA1;PA2;PG1;PG2;PG3;PG4;PG5;PG6;PG7;PG8;PG9;PS1;PS2;PS3;PS4;PT1;PT2;PT3;PT4;PT5;PT6;PT7;PT8</text:p>
          </table:table-cell>
          <table:table-cell table:number-columns-repeated="2"/>
        </table:table-row>
        <table:table-row table:style-name="ro2">
          <table:table-cell/>
          <table:table-cell table:style-name="ce140" office:value-type="string" calcext:value-type="string">
            <text:p>Total do número sequencia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8" office:value-type="string" calcext:value-type="string">
            <text:p>Tipo de Coordenada</text:p>
          </table:table-cell>
          <table:table-cell office:value-type="string" calcext:value-type="string">
            <text:p>Dígitos decimais para UT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Geográfic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ig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egundo(GM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E (UTM)</text:p>
          </table:table-cell>
          <table:table-cell office:value-type="float" office:value="834300" calcext:value-type="float">
            <text:p>8343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E (UTM)</text:p>
          </table:table-cell>
          <table:table-cell office:value-type="float" office:value="165700" calcext:value-type="float">
            <text:p>1657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ong (Geográfica)</text:p>
          </table:table-cell>
          <table:table-cell table:style-name="ce141" office:value-type="float" office:value="-34.79166667" calcext:value-type="float">
            <text:p>-34,791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ong (Geográfica)</text:p>
          </table:table-cell>
          <table:table-cell table:style-name="ce141" office:value-type="float" office:value="-73.99222222" calcext:value-type="float">
            <text:p>-73,99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N (UTM)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N (UTM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at (Geográfica)</text:p>
          </table:table-cell>
          <table:table-cell table:style-name="ce141" office:value-type="float" office:value="5.27222222" calcext:value-type="float">
            <text:p>5,27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at (Geográfica)</text:p>
          </table:table-cell>
          <table:table-cell table:style-name="ce141" office:value-type="float" office:value="-33.75083333" calcext:value-type="float">
            <text:p>-33,750833</text:p>
          </table:table-cell>
          <table:table-cell table:number-columns-repeated="2"/>
        </table:table-row>
      </table:table>
      <table:table table:name="parametros_imovel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number-columns-repeated="2" table:default-cell-style-name="Default"/>
        <table:table-row table:style-name="ro2">
          <table:table-cell table:style-name="ce142" office:value-type="string" calcext:value-type="string" table:number-columns-spanned="1" table:number-rows-spanned="2">
            <text:p>Parâmetros para a validação de Imóveis</text:p>
          </table:table-cell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157" office:value-type="string" calcext:value-type="string">
            <text:p>Natureza da área</text:p>
          </table:table-cell>
          <table:table-cell table:style-name="ce142"/>
          <table:table-cell table:style-name="ce142" office:value-type="string" calcext:value-type="string">
            <text:p>Imóvel Registrado</text:p>
          </table:table-cell>
          <table:table-cell table:style-name="ce142" office:value-type="string" calcext:value-type="string">
            <text:p>Área Titulada não Registrada</text:p>
          </table:table-cell>
          <table:table-cell table:style-name="ce142" office:value-type="string" calcext:value-type="string">
            <text:p>Área não Titul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ureza da área/Situação = Valor lógico</text:p>
          </table:table-cell>
          <table:table-cell table:style-name="ce159" office:value-type="string" calcext:value-type="string">
            <text:p>Assentamento</text:p>
          </table:table-cell>
          <table:table-cell table:number-columns-repeated="3" table:style-name="ce160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Células formatadas 'Logica'</text:p>
          </table:table-cell>
          <table:table-cell table:style-name="ce159" office:value-type="string" calcext:value-type="string">
            <text:p>Estrada</text:p>
          </table:table-cell>
          <table:table-cell table:number-columns-repeated="2" table:style-name="ce160" office:value-type="boolean" office:boolean-value="2" calcext:value-type="boolean">
            <text:p>VERDADEIRO</text:p>
          </table:table-cell>
          <table:table-cell table:style-name="ce160" office:value-type="boolean" office:boolean-value="false" calcext:value-type="boolean">
            <text:p>FALSO</text:p>
          </table:table-cell>
          <table:table-cell/>
          <table:table-cell table:style-name="ce162"/>
        </table:table-row>
        <table:table-row table:style-name="ro2">
          <table:table-cell office:value-type="string" calcext:value-type="string">
            <text:p>** Valor Lógico (Português):</text:p>
          </table:table-cell>
          <table:table-cell table:style-name="ce159" office:value-type="string" calcext:value-type="string">
            <text:p>Ferrovia</text:p>
          </table:table-cell>
          <table:table-cell table:number-columns-repeated="2" table:style-name="ce160" office:value-type="boolean" office:boolean-value="3" calcext:value-type="boolean">
            <text:p>VERDADEIRO</text:p>
          </table:table-cell>
          <table:table-cell table:style-name="ce160" office:value-type="boolean" office:boolean-value="false" calcext:value-type="boolean">
            <text:p>FALSO</text:p>
          </table:table-cell>
          <table:table-cell/>
          <table:table-cell table:style-name="ce162"/>
        </table:table-row>
        <table:table-row table:style-name="ro2">
          <table:table-cell table:style-name="ce158" office:value-type="boolean" office:boolean-value="true" calcext:value-type="boolean">
            <text:p>VERDADEIRO</text:p>
          </table:table-cell>
          <table:table-cell table:style-name="ce159" office:value-type="string" calcext:value-type="string">
            <text:p>Floresta Pública</text:p>
          </table:table-cell>
          <table:table-cell table:number-columns-repeated="2" table:style-name="ce160" office:value-type="boolean" office:boolean-value="4" calcext:value-type="boolean">
            <text:p>VERDADEIRO</text:p>
          </table:table-cell>
          <table:table-cell table:style-name="ce160" office:value-type="boolean" office:boolean-value="false" calcext:value-type="boolean">
            <text:p>FALSO</text:p>
          </table:table-cell>
          <table:table-cell/>
          <table:table-cell table:style-name="ce162"/>
        </table:table-row>
        <table:table-row table:style-name="ro2">
          <table:table-cell/>
          <table:table-cell table:style-name="ce159" office:value-type="string" calcext:value-type="string">
            <text:p>Gleba Pública</text:p>
          </table:table-cell>
          <table:table-cell table:number-columns-repeated="2" table:style-name="ce160" office:value-type="boolean" office:boolean-value="5" calcext:value-type="boolean">
            <text:p>VERDADEIRO</text:p>
          </table:table-cell>
          <table:table-cell table:style-name="ce160" office:value-type="boolean" office:boolean-value="false" calcext:value-type="boolean">
            <text:p>FALSO</text:p>
          </table:table-cell>
          <table:table-cell/>
          <table:table-cell table:style-name="ce162"/>
        </table:table-row>
        <table:table-row table:style-name="ro2">
          <table:table-cell/>
          <table:table-cell table:style-name="ce159" office:value-type="string" calcext:value-type="string">
            <text:p>Particular</text:p>
          </table:table-cell>
          <table:table-cell table:number-columns-repeated="2" table:style-name="ce160" office:value-type="boolean" office:boolean-value="6" calcext:value-type="boolean">
            <text:p>VERDADEIRO</text:p>
          </table:table-cell>
          <table:table-cell table:style-name="ce160" office:value-type="boolean" office:boolean-value="2" calcext:value-type="boolean">
            <text:p>VERDADEIRO</text:p>
          </table:table-cell>
          <table:table-cell/>
          <table:table-cell table:style-name="ce162"/>
        </table:table-row>
        <table:table-row table:style-name="ro2">
          <table:table-cell/>
          <table:table-cell table:style-name="ce159" office:value-type="string" calcext:value-type="string">
            <text:p>Perímetro Urbano</text:p>
          </table:table-cell>
          <table:table-cell table:number-columns-repeated="2" table:style-name="ce160" office:value-type="boolean" office:boolean-value="7" calcext:value-type="boolean">
            <text:p>VERDADEIRO</text:p>
          </table:table-cell>
          <table:table-cell table:style-name="ce160" office:value-type="boolean" office:boolean-value="2" calcext:value-type="boolean">
            <text:p>VERDADEIRO</text:p>
          </table:table-cell>
          <table:table-cell/>
          <table:table-cell table:style-name="ce162"/>
        </table:table-row>
        <table:table-row table:style-name="ro2">
          <table:table-cell/>
          <table:table-cell table:style-name="ce159" office:value-type="string" calcext:value-type="string">
            <text:p>Terra Indígena</text:p>
          </table:table-cell>
          <table:table-cell table:number-columns-repeated="2" table:style-name="ce160" office:value-type="boolean" office:boolean-value="8" calcext:value-type="boolean">
            <text:p>VERDADEIRO</text:p>
          </table:table-cell>
          <table:table-cell table:style-name="ce161" office:value-type="boolean" office:boolean-value="true" calcext:value-type="boolean">
            <text:p>VERDADEIRO</text:p>
          </table:table-cell>
          <table:table-cell/>
          <table:table-cell table:style-name="ce162"/>
        </table:table-row>
        <table:table-row table:style-name="ro2">
          <table:table-cell/>
          <table:table-cell table:style-name="ce159" office:value-type="string" calcext:value-type="string">
            <text:p>Terreno de Marinha</text:p>
          </table:table-cell>
          <table:table-cell table:number-columns-repeated="2" table:style-name="ce160" office:value-type="boolean" office:boolean-value="9" calcext:value-type="boolean">
            <text:p>VERDADEIRO</text:p>
          </table:table-cell>
          <table:table-cell table:style-name="ce161" office:value-type="boolean" office:boolean-value="true" calcext:value-type="boolean">
            <text:p>VERDADEIRO</text:p>
          </table:table-cell>
          <table:table-cell/>
          <table:table-cell table:style-name="ce162"/>
        </table:table-row>
        <table:table-row table:style-name="ro2">
          <table:table-cell/>
          <table:table-cell table:style-name="ce159" office:value-type="string" calcext:value-type="string">
            <text:p>Terreno Marginal</text:p>
          </table:table-cell>
          <table:table-cell table:number-columns-repeated="2" table:style-name="ce160" office:value-type="boolean" office:boolean-value="10" calcext:value-type="boolean">
            <text:p>VERDADEIRO</text:p>
          </table:table-cell>
          <table:table-cell table:style-name="ce161" office:value-type="boolean" office:boolean-value="true" calcext:value-type="boolean">
            <text:p>VERDADEIRO</text:p>
          </table:table-cell>
          <table:table-cell/>
          <table:table-cell table:style-name="ce162"/>
        </table:table-row>
        <table:table-row table:style-name="ro2">
          <table:table-cell/>
          <table:table-cell table:style-name="ce159" office:value-type="string" calcext:value-type="string">
            <text:p>Território Quilombola</text:p>
          </table:table-cell>
          <table:table-cell table:number-columns-repeated="2" table:style-name="ce160" office:value-type="boolean" office:boolean-value="11" calcext:value-type="boolean">
            <text:p>VERDADEIRO</text:p>
          </table:table-cell>
          <table:table-cell table:style-name="ce160" office:value-type="boolean" office:boolean-value="false" calcext:value-type="boolean">
            <text:p>FALSO</text:p>
          </table:table-cell>
          <table:table-cell/>
          <table:table-cell table:style-name="ce162"/>
        </table:table-row>
        <table:table-row table:style-name="ro2">
          <table:table-cell/>
          <table:table-cell table:style-name="ce159" office:value-type="string" calcext:value-type="string">
            <text:p>Unidade de Conservação</text:p>
          </table:table-cell>
          <table:table-cell table:number-columns-repeated="2" table:style-name="ce160" office:value-type="boolean" office:boolean-value="12" calcext:value-type="boolean">
            <text:p>VERDADEIRO</text:p>
          </table:table-cell>
          <table:table-cell table:style-name="ce161" office:value-type="boolean" office:boolean-value="true" calcext:value-type="boolean">
            <text:p>VERDADEIRO</text:p>
          </table:table-cell>
          <table:table-cell/>
          <table:table-cell table:style-name="ce162"/>
        </table:table-row>
        <table:table-row table:style-name="ro6" table:number-rows-repeated="1048560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parametros_vertice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54" table:default-cell-style-name="Default"/>
        <table:table-column table:style-name="co55" table:default-cell-style-name="Default"/>
        <table:table-column table:style-name="co56" table:default-cell-style-name="ce102"/>
        <table:table-column table:style-name="co57" table:number-columns-repeated="9" table:default-cell-style-name="Default"/>
        <table:table-column table:style-name="co58" table:default-cell-style-name="Default"/>
        <table:table-column table:style-name="co13" table:number-columns-repeated="48" table:default-cell-style-name="Default"/>
        <table:table-row table:style-name="ro2">
          <table:table-cell table:style-name="ce98" office:value-type="string" calcext:value-type="string" table:number-columns-spanned="1" table:number-rows-spanned="2">
            <text:p>Parâmetros para a validação de vértices</text:p>
          </table:table-cell>
          <table:table-cell table:style-name="ce102"/>
          <table:table-cell/>
          <table:table-cell table:style-name="ce102" table:number-columns-repeated="58"/>
        </table:table-row>
        <table:table-row table:style-name="ro2">
          <table:covered-table-cell table:style-name="ce164" table:content-validation-name="val2"/>
          <table:table-cell table:style-name="ce164" table:content-validation-name="val2" table:number-columns-spanned="3" table:number-rows-spanned="1"/>
          <table:covered-table-cell table:number-columns-repeated="2" table:style-name="ce164" table:content-validation-name="val2"/>
          <table:table-cell table:style-name="ce102" table:number-columns-repeated="57"/>
        </table:table-row>
        <table:table-row table:style-name="ro2">
          <table:table-cell table:style-name="ce100" table:content-validation-name="val2" office:value-type="string" calcext:value-type="string">
            <text:p>Código</text:p>
          </table:table-cell>
          <table:table-cell table:style-name="ce100" table:content-validation-name="val2" office:value-type="string" calcext:value-type="string">
            <text:p>Tipo de Limite</text:p>
          </table:table-cell>
          <table:table-cell table:style-name="ce100" table:content-validation-name="val2" office:value-type="string" calcext:value-type="string">
            <text:p>Tipo de Vértice</text:p>
          </table:table-cell>
          <table:table-cell table:style-name="ce100" table:content-validation-name="val2" office:value-type="string" calcext:value-type="string">
            <text:p>Precisão(m)</text:p>
          </table:table-cell>
          <table:table-cell table:style-name="ce102" office:value-type="string" calcext:value-type="string">
            <text:p>Limite superior (incluso)</text:p>
          </table:table-cell>
          <table:table-cell table:style-name="ce102" table:number-columns-repeated="56"/>
        </table:table-row>
        <table:table-row table:style-name="ro2">
          <table:table-cell table:style-name="ce101" office:value-type="string" calcext:value-type="string">
            <text:p>PG1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1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/>
          <table:table-cell table:style-name="ce102" office:value-type="string" calcext:value-type="string">
            <text:p>* Reinicializar o arquivo para alterar os valores dos parâmetros</text:p>
          </table:table-cell>
          <table:table-cell table:style-name="ce102" table:number-columns-repeated="55"/>
        </table:table-row>
        <table:table-row table:style-name="ro2">
          <table:table-cell table:style-name="ce101" office:value-type="string" calcext:value-type="string">
            <text:p>PG1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1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/>
          <table:table-cell table:style-name="ce104" office:value-type="string" calcext:value-type="string">
            <text:p>**A ordem das linhas definem a precisão nos casos dos vértice que fazem divisa entre tipos de limite (Mesmo código e vértice)</text:p>
          </table:table-cell>
          <table:table-cell table:style-name="ce102" table:number-columns-repeated="55"/>
        </table:table-row>
        <table:table-row table:style-name="ro2">
          <table:table-cell table:style-name="ce101" office:value-type="string" calcext:value-type="string">
            <text:p>PG2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/>
          <table:table-cell table:style-name="ce104"/>
          <table:table-cell table:style-name="ce102" table:number-columns-repeated="55"/>
        </table:table-row>
        <table:table-row table:style-name="ro2">
          <table:table-cell table:style-name="ce101" office:value-type="string" calcext:value-type="string">
            <text:p>PG2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/>
          <table:table-cell table:style-name="ce104" office:value-type="string" calcext:value-type="string">
            <text:p>*** O tipo de limite possui valor do Grupo: <text:s/>LN(Limite Natural) e (LA)Limite Artificial</text:p>
          </table:table-cell>
          <table:table-cell table:style-name="ce102" table:number-columns-repeated="55"/>
        </table:table-row>
        <table:table-row table:style-name="ro2">
          <table:table-cell table:style-name="ce101" office:value-type="string" calcext:value-type="string">
            <text:p>PG2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2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3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3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3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3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4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4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5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6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6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6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6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7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7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7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7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8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9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9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9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G9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T1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T1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T1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T1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T2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T2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T2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T2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T3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T3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T3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3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4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4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4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4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5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5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5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5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6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6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M</text:p>
          </table:table-cell>
          <table:table-cell table:style-name="ce103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6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6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P</text:p>
          </table:table-cell>
          <table:table-cell table:style-name="ce103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6</text:p>
          </table:table-cell>
          <table:table-cell table:style-name="ce101" office:value-type="string" calcext:value-type="string">
            <text:p>LN</text:p>
          </table:table-cell>
          <table:table-cell table:style-name="ce101" office:value-type="string" calcext:value-type="string">
            <text:p>V</text:p>
          </table:table-cell>
          <table:table-cell table:style-name="ce103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101" office:value-type="string" calcext:value-type="string">
            <text:p>PT6</text:p>
          </table:table-cell>
          <table:table-cell table:style-name="ce101" office:value-type="string" calcext:value-type="string">
            <text:p>LA</text:p>
          </table:table-cell>
          <table:table-cell table:style-name="ce101" office:value-type="string" calcext:value-type="string">
            <text:p>V</text:p>
          </table:table-cell>
          <table:table-cell table:style-name="ce103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A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A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A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A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S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S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S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S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S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S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S4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102" office:value-type="string" calcext:value-type="string">
            <text:p>PS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3" table:number-rows-repeated="124">
          <table:table-cell table:style-name="ce102"/>
          <table:table-cell table:number-columns-repeated="60"/>
        </table:table-row>
        <table:table-row table:style-name="ro3" table:number-rows-repeated="104837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parametros_vertice_validacao_exce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54" table:default-cell-style-name="Default"/>
        <table:table-column table:style-name="co55" table:default-cell-style-name="Default"/>
        <table:table-column table:style-name="co56" table:default-cell-style-name="ce102"/>
        <table:table-column table:style-name="co57" table:number-columns-repeated="8" table:default-cell-style-name="Default"/>
        <table:table-column table:style-name="co58" table:default-cell-style-name="Default"/>
        <table:table-column table:style-name="co13" table:number-columns-repeated="48" table:default-cell-style-name="Default"/>
        <table:table-row table:style-name="ro13">
          <table:table-cell table:style-name="ce98" office:value-type="string" calcext:value-type="string" table:number-columns-spanned="1" table:number-rows-spanned="2">
            <text:p>Parâmetros para a validação de vértices exceção</text:p>
          </table:table-cell>
          <table:table-cell table:style-name="ce102"/>
          <table:table-cell/>
          <table:table-cell table:style-name="ce102" table:number-columns-repeated="57"/>
        </table:table-row>
        <table:table-row table:style-name="ro2">
          <table:covered-table-cell table:style-name="ce164" table:content-validation-name="val2"/>
          <table:table-cell table:style-name="ce164" table:content-validation-name="val2" table:number-columns-spanned="2" table:number-rows-spanned="1"/>
          <table:covered-table-cell table:style-name="ce164" table:content-validation-name="val2"/>
          <table:table-cell table:style-name="ce102" table:number-columns-repeated="57"/>
        </table:table-row>
        <table:table-row table:style-name="ro2">
          <table:table-cell table:style-name="ce100" table:content-validation-name="val2" office:value-type="string" calcext:value-type="string">
            <text:p>Código</text:p>
          </table:table-cell>
          <table:table-cell table:style-name="ce100" table:content-validation-name="val2" office:value-type="string" calcext:value-type="string">
            <text:p>Tipo de Limite</text:p>
          </table:table-cell>
          <table:table-cell table:style-name="ce100" table:content-validation-name="val2" office:value-type="string" calcext:value-type="string">
            <text:p>Tipo de Vértice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S1</text:p>
          </table:table-cell>
          <table:table-cell table:style-name="ce101" office:value-type="string" calcext:value-type="string">
            <text:p>LA1</text:p>
          </table:table-cell>
          <table:table-cell table:style-name="ce101" office:value-type="string" calcext:value-type="string">
            <text:p>V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S2</text:p>
          </table:table-cell>
          <table:table-cell table:style-name="ce101" office:value-type="string" calcext:value-type="string">
            <text:p>LA1</text:p>
          </table:table-cell>
          <table:table-cell table:style-name="ce101" office:value-type="string" calcext:value-type="string">
            <text:p>V</text:p>
          </table:table-cell>
          <table:table-cell table:style-name="ce102"/>
          <table:table-cell table:style-name="ce102" office:value-type="string" calcext:value-type="string">
            <text:p>* Reinicializar o arquivo para alterar os valores dos parâmetros</text:p>
          </table:table-cell>
          <table:table-cell table:style-name="ce102" table:number-columns-repeated="55"/>
        </table:table-row>
        <table:table-row table:style-name="ro2">
          <table:table-cell table:style-name="ce101" office:value-type="string" calcext:value-type="string">
            <text:p>PS3</text:p>
          </table:table-cell>
          <table:table-cell table:style-name="ce101" office:value-type="string" calcext:value-type="string">
            <text:p>LA1</text:p>
          </table:table-cell>
          <table:table-cell table:style-name="ce101" office:value-type="string" calcext:value-type="string">
            <text:p>V</text:p>
          </table:table-cell>
          <table:table-cell table:style-name="ce102" table:number-columns-repeated="57"/>
        </table:table-row>
        <table:table-row table:style-name="ro2">
          <table:table-cell table:style-name="ce101" office:value-type="string" calcext:value-type="string">
            <text:p>PS4</text:p>
          </table:table-cell>
          <table:table-cell table:style-name="ce101" office:value-type="string" calcext:value-type="string">
            <text:p>LA1</text:p>
          </table:table-cell>
          <table:table-cell table:style-name="ce101" office:value-type="string" calcext:value-type="string">
            <text:p>V</text:p>
          </table:table-cell>
          <table:table-cell table:style-name="ce102"/>
          <table:table-cell table:style-name="ce104"/>
          <table:table-cell table:style-name="ce102" table:number-columns-repeated="55"/>
        </table:table-row>
        <table:table-row table:style-name="ro2" table:number-rows-repeated="2">
          <table:table-cell table:style-name="ce101" table:number-columns-repeated="3"/>
          <table:table-cell table:style-name="ce102"/>
          <table:table-cell table:style-name="ce104"/>
          <table:table-cell table:style-name="ce102" table:number-columns-repeated="55"/>
        </table:table-row>
        <table:table-row table:style-name="ro2" table:number-rows-repeated="32">
          <table:table-cell table:style-name="ce101" table:number-columns-repeated="3"/>
          <table:table-cell table:style-name="ce102" table:number-columns-repeated="57"/>
        </table:table-row>
        <table:table-row table:style-name="ro2" table:number-rows-repeated="16">
          <table:table-cell table:style-name="ce101" table:number-columns-repeated="3"/>
          <table:table-cell table:number-columns-repeated="57"/>
        </table:table-row>
        <table:table-row table:style-name="ro3" table:number-rows-repeated="146">
          <table:table-cell table:style-name="ce102"/>
          <table:table-cell table:number-columns-repeated="59"/>
        </table:table-row>
        <table:table-row table:style-name="ro3" table:number-rows-repeated="1048372">
          <table:table-cell table:number-columns-repeated="60"/>
        </table:table-row>
        <table:table-row table:style-name="ro3">
          <table:table-cell table:number-columns-repeated="60"/>
        </table:table-row>
      </table:table>
      <table:named-expressions/>
      <table:database-ranges>
        <table:database-range table:name="__Anonymous_Sheet_DB__3" table:target-range-address="parametros_controles.B23:parametros_controles.B55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79P0" style:volatile="true">
      <number:number number:decimal-places="0" number:min-decimal-places="0" number:min-integer-digits="1" number:grouping="true"/>
    </number:number-style>
    <number:number-style style:name="N179">
      <number:text>-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15">
      <number:number number:decimal-places="20" number:min-decimal-places="20" number:min-integer-digits="1"/>
    </number:number-style>
    <number:number-style style:name="N18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19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R$ -</number:text>
      <number:number number:decimal-places="0" number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1P0" style:volatile="true">
      <number:text>R$ 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4">
      <number:text> $ </number:text>
      <number:number number:decimal-places="0" number:min-decimal-places="0" number:min-integer-digits="1" number:grouping="true"/>
      <number:text> </number:text>
    </number:number-style>
    <number:number-style style:name="N189P0" style:volatile="true">
      <number:number number:decimal-places="1" number:min-decimal-places="1" number:min-integer-digits="1" number:grouping="true"/>
      <number:text> </number:text>
    </number:number-style>
    <number:number-style style:name="N189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89P2" style:volatile="true">
      <number:text>-</number:text>
      <number:number number:decimal-places="0" number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25">
      <number:number number:decimal-places="0" number:min-decimal-places="0" number:min-integer-digits="0">
        <number:embedded-text number:position="2">-</number:embedded-text>
      </number:number>
    </number:number-style>
    <number:number-style style:name="N126">
      <number:number number:decimal-places="0" number:min-decimal-places="0" number:min-integer-digits="1" number:grouping="true"/>
      <number:text> </number:text>
    </number:number-style>
    <number:number-style style:name="N130">
      <number:number number:decimal-places="4" number:min-decimal-places="4" number:min-integer-digits="1"/>
    </number:number-style>
    <number:number-style style:name="N198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text> $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0" number:min-decimal-places="0" number:min-integer-digits="11"/>
    </number:number-style>
    <number:number-style style:name="N200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R$ 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136">
      <number:number number:decimal-places="2" number:min-decimal-places="2" number:min-integer-digits="1" number:grouping="true"/>
      <number:text> </number:text>
    </number:number-style>
    <number:number-style style:name="N201P0" style:volatile="true">
      <number:number number:decimal-places="2" number:min-decimal-places="2" number:min-integer-digits="1" number:grouping="true"/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P0"/>
    </number:number-style>
    <number:number-style style:name="N137">
      <number:text>  (</number:text>
      <number:number number:decimal-places="2" number:min-decimal-places="2" number:min-integer-digits="1" number:grouping="true"/>
      <number:text>)</number:text>
    </number:number-style>
    <number:number-style style:name="N138">
      <number:text>  - </number:text>
    </number:number-style>
    <number:number-style style:name="N203P0" style:volatile="true"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03P2" style:volatile="true">
      <number:text>-</number:text>
      <number:number number:decimal-places="0" number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3" number:min-decimal-places="3" number:min-integer-digits="1" number:grouping="true"/>
      <number:text> </number:text>
    </number:number-style>
    <number:number-style style:name="N143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43P2" style:volatile="true"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number-style style:name="N20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10">
      <number:number number:decimal-places="1" number:min-decimal-places="1" number:min-integer-digits="1"/>
    </number:number-style>
    <number:time-style style:name="N146">
      <number:minutes number:style="long"/>
      <number:text>:</number:text>
      <number:seconds number:style="long" number:decimal-places="1"/>
    </number:time-style>
    <number:number-style style:name="N2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2P0"/>
    </number:number-style>
    <number:number-style style:name="N148P0" style:volatile="true">
      <number:text>Sim</number:text>
    </number:number-style>
    <number:number-style style:name="N148P1" style:volatile="true">
      <number:text>Sim</number:text>
    </number:number-style>
    <number:number-style style:name="N148">
      <number:text>Não</number:text>
      <style:map style:condition="value()&gt;0" style:apply-style-name="N148P0"/>
      <style:map style:condition="value()&lt;0" style:apply-style-name="N148P1"/>
    </number:number-style>
    <number:number-style style:name="N149">
      <number:number number:decimal-places="5" number:min-decimal-places="5" number:min-integer-digits="1"/>
    </number:number-style>
    <number:number-style style:name="N150">
      <number:text> $ (</number:text>
      <number:number number:decimal-places="0" number:min-decimal-places="0" number:min-integer-digits="1" number:grouping="true"/>
      <number:text>)</number:text>
    </number:number-style>
    <number:number-style style:name="N15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2">
      <number:text> $ - </number:text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$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3" number:min-decimal-places="3" number:min-integer-digits="1"/>
    </number:number-style>
    <number:number-style style:name="N156">
      <number:number number:decimal-places="4" number:min-decimal-places="4" number:min-integer-digits="1" number:grouping="true"/>
    </number:number-style>
    <number:currency-style style:name="N15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text>R$ </number:text>
      <number:number number:decimal-places="0" number:min-decimal-places="0" number:min-integer-digits="1" number:grouping="true"/>
    </number:number-style>
    <number:number-style style:name="N159">
      <number:text>-R$ 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">
      <number:number number:decimal-places="6" number:min-decimal-places="6" number:min-integer-digits="1"/>
    </number:number-style>
    <number:number-style style:name="N161">
      <number:text>R$ </number:text>
      <number:number number:decimal-places="2" number:min-decimal-places="2" number:min-integer-digits="1" number:grouping="true"/>
    </number:number-style>
    <number:number-style style:name="N163P0" style:volatile="true">
      <number:text>Ativar</number:text>
    </number:number-style>
    <number:number-style style:name="N163P1" style:volatile="true">
      <number:text>Ativar</number:text>
    </number:number-style>
    <number:number-style style:name="N163">
      <number:text>Desativar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Verdadeiro</number:text>
    </number:number-style>
    <number:number-style style:name="N165P1" style:volatile="true">
      <number:text>Verdadeiro</number:text>
    </number:number-style>
    <number:number-style style:name="N165">
      <number:text>Falso</number:text>
      <style:map style:condition="value()&gt;0" style:apply-style-name="N165P0"/>
      <style:map style:condition="value()&lt;0" style:apply-style-name="N165P1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R$ 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8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78P2" style:volatile="true">
      <number:text> R$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">
      <number:text>  (</number:text>
      <number:number number:decimal-places="0" number:min-decimal-places="0" number:min-integer-digits="1" number:grouping="true"/>
      <number:text>)</number:text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2" number:min-decimal-places="2" number:min-integer-digits="1" number:grouping="true"/>
    </number:number-style>
    <number:number-style style:name="N182">
      <number:text>-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4P0" style:volatile="true">
      <number:text>R$ </number:text>
      <number:number number:decimal-places="2" number:min-decimal-places="2" number:min-integer-digits="1" number:grouping="true"/>
    </number:number-style>
    <number:number-style style:name="N184">
      <number:text>-R$ </number:text>
      <number:number number:decimal-places="2" number:min-decimal-places="2" number:min-integer-digits="1" number:grouping="true"/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/>
      <number:text> </number:text>
    </number:number-style>
    <number:number-style style:name="N186">
      <number:text>(</number:text>
      <number:number number:decimal-places="2" number:min-decimal-places="2" number:min-integer-digits="1"/>
      <number:text>)</number:text>
      <style:map style:condition="value()&gt;=0" style:apply-style-name="N186P0"/>
    </number:number-style>
    <number:number-style style:name="N191P0" style:volatile="true"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1P2" style:volatile="true">
      <number:text>-</number:text>
      <number:number number:decimal-places="0" number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 $ </number:text>
      <number:number number:decimal-places="2" number:min-decimal-places="2" number:min-integer-digits="1" number:grouping="true"/>
      <number:text> </number:text>
    </number:number-style>
    <number:number-style style:name="N197">
      <number:text> $ (</number:text>
      <number:number number:decimal-places="2" number:min-decimal-places="2" number:min-integer-digits="1" number:grouping="true"/>
      <number:text>)</number:text>
    </number:number-style>
    <number:number-style style:name="N205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205P2" style:volatile="true">
      <number:text> R$ -</number:text>
      <number:number number:decimal-places="0" number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time-style style:name="N2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14" number:language="pt" number:country="BR">
      <number:number number:decimal-places="3" number:min-decimal-places="3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motta </meta:initial-creator>
    <meta:creation-date>2013-02-07T23:11:31</meta:creation-date>
    <meta:generator>LibreOffice/7.5.0.3$Windows_X86_64 LibreOffice_project/c21113d003cd3efa8c53188764377a8272d9d6de</meta:generator>
    <dc:date>2026-06-03T13:43:10.656000000</dc:date>
    <meta:editing-duration>PT18H11M30S</meta:editing-duration>
    <meta:editing-cycles>90</meta:editing-cycles>
    <meta:document-statistic meta:table-count="8" meta:cell-count="6787" meta:object-count="14"/>
  </office:meta>
</office:document-meta>
</file>